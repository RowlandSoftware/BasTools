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aramond" svg:font-family="Garamond"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lgun Gothic" svg:font-family="'Malgun Gothic'" style:font-family-generic="swiss"/>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paragraph-properties fo:margin-left="0cm" fo:margin-right="0cm" fo:text-indent="0cm" style:auto-text-indent="false"/>
    </style:style>
    <style:style style:name="P4" style:family="paragraph" style:parent-style-name="Text_20_body" style:list-style-name="L2">
      <style:paragraph-properties fo:margin-left="0cm" fo:margin-right="0cm" fo:text-indent="0cm" style:auto-text-indent="false"/>
    </style:style>
    <style:style style:name="P5" style:family="paragraph" style:parent-style-name="Preformatted_20_Text">
      <style:paragraph-properties fo:margin-left="0cm" fo:margin-right="0cm" fo:margin-top="0cm" fo:margin-bottom="0.499cm" style:contextual-spacing="false" fo:text-indent="0cm" style:auto-text-indent="false"/>
    </style:style>
    <style:style style:name="P6" style:family="paragraph" style:parent-style-name="Text_20_body" style:list-style-name="L3">
      <style:paragraph-properties fo:margin-left="0cm" fo:margin-right="0cm" fo:text-indent="0cm" style:auto-text-indent="false"/>
    </style:style>
    <style:style style:name="P7" style:family="paragraph" style:parent-style-name="Preformatted_20_Text">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list-style-name="L5">
      <style:paragraph-properties fo:margin-left="0cm" fo:margin-right="0cm" fo:text-indent="0cm" style:auto-text-indent="false"/>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list-style-name="L6">
      <style:paragraph-properties fo:margin-left="0cm" fo:margin-right="0cm" fo:text-indent="0cm" style:auto-text-indent="false"/>
    </style:style>
    <style:style style:name="P12" style:family="paragraph" style:parent-style-name="Text_20_body" style:list-style-name="L7">
      <style:paragraph-properties fo:margin-left="0cm" fo:margin-right="0cm" fo:text-indent="0cm" style:auto-text-indent="false"/>
    </style:style>
    <style:style style:name="P13" style:family="paragraph" style:parent-style-name="Quotations">
      <style:paragraph-properties fo:margin-left="1cm" fo:margin-right="1cm" fo:text-indent="0cm" style:auto-text-indent="false"/>
    </style:style>
    <style:style style:name="P14" style:family="paragraph" style:parent-style-name="Text_20_body" style:list-style-name="L8">
      <style:paragraph-properties fo:margin-left="0cm" fo:margin-right="0cm" fo:text-indent="0cm" style:auto-text-indent="false"/>
    </style:style>
    <style:style style:name="P15" style:family="paragraph" style:parent-style-name="Text_20_body" style:list-style-name="L9">
      <style:paragraph-properties fo:margin-left="0cm" fo:margin-right="0cm" fo:text-indent="0cm" style:auto-text-indent="false"/>
    </style:style>
    <style:style style:name="P16" style:family="paragraph" style:parent-style-name="Text_20_body" style:list-style-name="L10">
      <style:paragraph-properties fo:margin-left="0cm" fo:margin-right="0cm" fo:text-indent="0cm" style:auto-text-indent="false"/>
    </style:style>
    <style:style style:name="P17" style:family="paragraph" style:parent-style-name="Text_20_body" style:list-style-name="L11">
      <style:paragraph-properties fo:margin-left="0cm" fo:margin-right="0cm" fo:text-indent="0cm" style:auto-text-indent="false"/>
    </style:style>
    <style:style style:name="P18" style:family="paragraph" style:parent-style-name="Text_20_body" style:list-style-name="L12">
      <style:paragraph-properties fo:margin-left="0cm" fo:margin-right="0cm" fo:text-indent="0cm" style:auto-text-indent="false"/>
    </style:style>
    <style:style style:name="P19" style:family="paragraph" style:parent-style-name="Text_20_body" style:list-style-name="L13">
      <style:paragraph-properties fo:margin-left="0cm" fo:margin-right="0cm" fo:text-indent="0cm" style:auto-text-indent="false"/>
    </style:style>
    <style:style style:name="T1" style:family="text">
      <style:text-properties officeooo:rsid="001230e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arches: My Advanced Search dbox and method carefully searches just the semantic categories specified. E.g. program has write%, FNwrite(B$), PROCwritename and write$(10). I search for 'write', specifying only Integer variables. I find, say, 2 matches. The JS script, however, highlights 20 places in yellow, and the SearchNavControl lets me swap between the first two -- netiher of which happen to be write%. I understand WHY this is happening -- no need to explain. The question is, is there a reasonably succinct way to make the JS script respect span boundaries (for example, integers will be wrapped in &lt;span class="var"&gt; &lt;/span&gt;? -- still not perfect as that can include strings, reals etc. but perhaps that can be mitigated, e.g. by insisting on full variable names in Advanced Search (as opposed to Quick S<text:span text:style-name="T1">ea</text:span>rc<text:span text:style-name="T1">h</text:span>, which doesn't)</text:p>
      <text:p text:style-name="P1"/>
      <text:section text:style-name="Sect1" text:name="1fvyo5hRDij35ECBzMPMB-content-0">
        <text:p text:style-name="P2">You’ve hit the exact boundary between <text:span text:style-name="Strong_20_Emphasis">semantic search</text:span> (your C# side) and <text:span text:style-name="Strong_20_Emphasis">dumb text search</text:span> (your JS side). Your C# search is <text:span text:style-name="Emphasis">correctly</text:span> finding only the symbols you asked for… …but the JS highlight engine is still doing a <text:span text:style-name="Strong_20_Emphasis">raw substring search</text:span> across the entire HTML.</text:p>
        <text:p text:style-name="P2">You don’t want to rewrite the whole JS engine. You don’t want to embed semantic metadata into the HTML. You don’t want to re‑run the semantic analyser in JavaScript.</text:p>
        <text:p text:style-name="P2">You want a <text:span text:style-name="Strong_20_Emphasis">succinct, robust way</text:span> to make the JS highlight only the matches your C# search found.</text:p>
        <text:p text:style-name="P2">And there <text:span text:style-name="Emphasis">is</text:span> one.</text:p>
        <text:h text:style-name="Heading_20_1" text:outline-level="1">⭐ The correct solution: <text:span text:style-name="Strong_20_Emphasis">JS highlights only the matches you explicitly tell it to</text:span></text:h>
        <text:p text:style-name="P2">Instead of:</text:p>
        <text:list text:style-name="L1">
          <text:list-item>
            <text:p text:style-name="P3">JS searching for “write”</text:p>
          </text:list-item>
          <text:list-item>
            <text:p text:style-name="P3">JS finding 20 matches</text:p>
          </text:list-item>
          <text:list-item>
            <text:p text:style-name="P3">C# finding 2 matches</text:p>
          </text:list-item>
          <text:list-item>
            <text:p text:style-name="P3">UI showing 2 matches but JS highlighting 20</text:p>
          </text:list-item>
        </text:list>
        <text:p text:style-name="P2">…you flip the model:</text:p>
        <text:h text:style-name="Heading_20_3" text:outline-level="3">✔ C# finds the matches</text:h>
        <text:h text:style-name="Heading_20_3" text:outline-level="3">✔ C# sends the exact match positions to JS</text:h>
        <text:h text:style-name="Heading_20_3" text:outline-level="3">✔ JS highlights <text:span text:style-name="Emphasis">only those positions</text:span></text:h>
        <text:p text:style-name="P2">This is how editors like VS Code do it.</text:p>
        <text:h text:style-name="Heading_20_1" text:outline-level="1">⭐ Why this is the right approach</text:h>
        <text:p text:style-name="P2">Because:</text:p>
        <text:list text:style-name="L2">
          <text:list-item>
            <text:p text:style-name="P4">JS cannot reliably respect span boundaries</text:p>
          </text:list-item>
          <text:list-item>
            <text:p text:style-name="P4">JS cannot know which spans represent integers, strings, procs, etc.</text:p>
          </text:list-item>
          <text:list-item>
            <text:p text:style-name="P4">JS cannot know which matches your semantic engine approved</text:p>
          </text:list-item>
          <text:list-item>
            <text:p text:style-name="P4"><text:soft-page-break/>JS cannot know which matches to ignore</text:p>
          </text:list-item>
          <text:list-item>
            <text:p text:style-name="P4">JS cannot know about whole‑word rules, symbol kinds, etc.</text:p>
          </text:list-item>
        </text:list>
        <text:p text:style-name="P2">Your C# semantic engine <text:span text:style-name="Strong_20_Emphasis">already knows everything</text:span>. So let it drive the highlighting.</text:p>
        <text:h text:style-name="Heading_20_1" text:outline-level="1">⭐ Minimal, clean implementation</text:h>
        <text:h text:style-name="Heading_20_2" text:outline-level="2">1. C# computes the matches</text:h>
        <text:p text:style-name="P2">You already have:</text:p>
        <text:p text:style-name="Text_20_body">csharp</text:p>
        <text:p text:style-name="P5"><text:span text:style-name="Source_20_Text">List&lt;SearchMatch&gt; matches;</text:span></text:p>
        <text:p text:style-name="P2">Each match has:</text:p>
        <text:list text:style-name="L3">
          <text:list-item>
            <text:p text:style-name="P6">line number</text:p>
          </text:list-item>
          <text:list-item>
            <text:p text:style-name="P6">column start</text:p>
          </text:list-item>
          <text:list-item>
            <text:p text:style-name="P6">length</text:p>
          </text:list-item>
        </text:list>
        <text:p text:style-name="P2">If not, you can easily add them.</text:p>
        <text:h text:style-name="Heading_20_2" text:outline-level="2">2. C# sends the match list to JS</text:h>
        <text:p text:style-name="Text_20_body">csharp</text:p>
        <text:p text:style-name="P7"><text:span text:style-name="Source_20_Text">var json = JsonSerializer.Serialize(matches);</text:span></text:p>
        <text:p text:style-name="P5"><text:span text:style-name="Source_20_Text">await webView2.CoreWebView2.ExecuteScriptAsync($"window.search.applyMatches({json});");</text:span></text:p>
        <text:h text:style-name="Heading_20_2" text:outline-level="2">3. JS highlights <text:span text:style-name="Emphasis">only</text:span> those matches</text:h>
        <text:p text:style-name="Text_20_body">js</text:p>
        <text:p text:style-name="P7"><text:span text:style-name="Source_20_Text">window.search.applyMatches = function(matches) {</text:span></text:p>
        <text:p text:style-name="P7"><text:span text:style-name="Source_20_Text"><text:s text:c="4"/>window.search.clear();</text:span></text:p>
        <text:p text:style-name="Preformatted_20_Text"/>
        <text:p text:style-name="P7"><text:span text:style-name="Source_20_Text"><text:s text:c="4"/>matches.forEach(m =&gt; {</text:span></text:p>
        <text:p text:style-name="P7"><text:span text:style-name="Source_20_Text"><text:s text:c="8"/>const line = document.getElementById("L" + m.line);</text:span></text:p>
        <text:p text:style-name="P7"><text:span text:style-name="Source_20_Text"><text:s text:c="8"/>if (!line) return;</text:span></text:p>
        <text:p text:style-name="Preformatted_20_Text"/>
        <text:p text:style-name="P7"><text:span text:style-name="Source_20_Text"><text:s text:c="8"/>const codeCell = line.querySelector(".code");</text:span></text:p>
        <text:p text:style-name="P7"><text:span text:style-name="Source_20_Text"><text:s text:c="8"/>if (!codeCell) return;</text:span></text:p>
        <text:p text:style-name="Preformatted_20_Text"/>
        <text:p text:style-name="P7"><text:span text:style-name="Source_20_Text"><text:s text:c="8"/>const walker = document.createTreeWalker(codeCell, NodeFilter.SHOW_TEXT);</text:span></text:p>
        <text:p text:style-name="P7"><text:span text:style-name="Source_20_Text"><text:s text:c="8"/>let offset = 0;</text:span></text:p>
        <text:p text:style-name="Preformatted_20_Text"/>
        <text:p text:style-name="P7"><text:span text:style-name="Source_20_Text"><text:s text:c="8"/>while (walker.nextNode()) {</text:span></text:p>
        <text:p text:style-name="P7"><text:span text:style-name="Source_20_Text"><text:s text:c="12"/>const node = walker.currentNode;</text:span></text:p>
        <text:p text:style-name="P7"><text:span text:style-name="Source_20_Text"><text:s text:c="12"/>const text = node.textContent;</text:span></text:p>
        <text:p text:style-name="Preformatted_20_Text"/>
        <text:p text:style-name="P7"><text:span text:style-name="Source_20_Text"><text:s text:c="12"/>if (offset + text.length &gt;= m.columnStart) {</text:span></text:p>
        <text:p text:style-name="P7"><text:soft-page-break/><text:span text:style-name="Source_20_Text"><text:s text:c="16"/>const localStart = m.columnStart - offset;</text:span></text:p>
        <text:p text:style-name="P7"><text:span text:style-name="Source_20_Text"><text:s text:c="16"/>const localEnd = localStart + m.length;</text:span></text:p>
        <text:p text:style-name="Preformatted_20_Text"/>
        <text:p text:style-name="P7"><text:span text:style-name="Source_20_Text"><text:s text:c="16"/>const before = text.slice(0, localStart);</text:span></text:p>
        <text:p text:style-name="P7"><text:span text:style-name="Source_20_Text"><text:s text:c="16"/>const hit = text.slice(localStart, localEnd);</text:span></text:p>
        <text:p text:style-name="P7"><text:span text:style-name="Source_20_Text"><text:s text:c="16"/>const after = text.slice(localEnd);</text:span></text:p>
        <text:p text:style-name="Preformatted_20_Text"/>
        <text:p text:style-name="P7"><text:span text:style-name="Source_20_Text"><text:s text:c="16"/>const span = document.createElement("span");</text:span></text:p>
        <text:p text:style-name="P7"><text:span text:style-name="Source_20_Text"><text:s text:c="16"/>span.className = "search-hit";</text:span></text:p>
        <text:p text:style-name="P7"><text:span text:style-name="Source_20_Text"><text:s text:c="16"/>span.textContent = hit;</text:span></text:p>
        <text:p text:style-name="Preformatted_20_Text"/>
        <text:p text:style-name="P7"><text:span text:style-name="Source_20_Text"><text:s text:c="16"/>const frag = document.createDocumentFragment();</text:span></text:p>
        <text:p text:style-name="P7"><text:span text:style-name="Source_20_Text"><text:s text:c="16"/>if (before) frag.appendChild(document.createTextNode(before));</text:span></text:p>
        <text:p text:style-name="P7"><text:span text:style-name="Source_20_Text"><text:s text:c="16"/>frag.appendChild(span);</text:span></text:p>
        <text:p text:style-name="P7"><text:span text:style-name="Source_20_Text"><text:s text:c="16"/>if (after) frag.appendChild(document.createTextNode(after));</text:span></text:p>
        <text:p text:style-name="Preformatted_20_Text"/>
        <text:p text:style-name="P7"><text:span text:style-name="Source_20_Text"><text:s text:c="16"/>node.replaceWith(frag);</text:span></text:p>
        <text:p text:style-name="P7"><text:span text:style-name="Source_20_Text"><text:s text:c="16"/>break;</text:span></text:p>
        <text:p text:style-name="P7"><text:span text:style-name="Source_20_Text"><text:s text:c="12"/>}</text:span></text:p>
        <text:p text:style-name="Preformatted_20_Text"/>
        <text:p text:style-name="P7"><text:span text:style-name="Source_20_Text"><text:s text:c="12"/>offset += text.length;</text:span></text:p>
        <text:p text:style-name="P7"><text:span text:style-name="Source_20_Text"><text:s text:c="8"/>}</text:span></text:p>
        <text:p text:style-name="P7"><text:span text:style-name="Source_20_Text"><text:s text:c="4"/>});</text:span></text:p>
        <text:p text:style-name="Preformatted_20_Text"/>
        <text:p text:style-name="P7"><text:span text:style-name="Source_20_Text"><text:s text:c="4"/>// mark first match as current</text:span></text:p>
        <text:p text:style-name="P7"><text:span text:style-name="Source_20_Text"><text:s text:c="4"/>if (matches.length &gt; 0) {</text:span></text:p>
        <text:p text:style-name="P7"><text:span text:style-name="Source_20_Text"><text:s text:c="8"/>document.querySelector(".search-hit").classList.add("search-current");</text:span></text:p>
        <text:p text:style-name="P7"><text:span text:style-name="Source_20_Text"><text:s text:c="4"/>}</text:span></text:p>
        <text:p text:style-name="P5"><text:span text:style-name="Source_20_Text">};</text:span></text:p>
        <text:h text:style-name="Heading_20_1" text:outline-level="1">⭐ Why this works perfectly</text:h>
        <text:h text:style-name="Heading_20_3" text:outline-level="3">✔ JS no longer performs any searching</text:h>
        <text:p text:style-name="P2">It only highlights what C# tells it.</text:p>
        <text:h text:style-name="Heading_20_3" text:outline-level="3">✔ No false positives</text:h>
        <text:p text:style-name="P2">Only the semantic matches are highlighted.</text:p>
        <text:h text:style-name="Heading_20_3" text:outline-level="3">✔ No span‑boundary issues</text:h>
        <text:p text:style-name="P2">You highlight by <text:span text:style-name="Strong_20_Emphasis">position</text:span>, not by substring.</text:p>
        <text:h text:style-name="Heading_20_3" text:outline-level="3">✔ Whole‑word, case‑sensitive, symbol‑kind filtering</text:h>
        <text:p text:style-name="P2">All handled by your C# semantic engine.</text:p>
        <text:h text:style-name="Heading_20_3" text:outline-level="3">✔ No need to modify your HTML</text:h>
        <text:p text:style-name="P2">No need to tag spans with symbol kinds.</text:p>
        <text:h text:style-name="Heading_20_3" text:outline-level="3">✔ No need to rewrite the JS search engine</text:h>
        <text:p text:style-name="P2">You simply bypass it.</text:p>
        <text:h text:style-name="Heading_20_1" text:outline-level="1"><text:soft-page-break/>⭐ If you want a simpler version</text:h>
        <text:p text:style-name="P2">I can give you a version that:</text:p>
        <text:list text:style-name="L4">
          <text:list-item>
            <text:p text:style-name="P8">highlights by line + substring</text:p>
          </text:list-item>
          <text:list-item>
            <text:p text:style-name="P8">doesn’t need column offsets</text:p>
          </text:list-item>
          <text:list-item>
            <text:p text:style-name="P8">works with your existing HTML structure</text:p>
          </text:list-item>
          <text:list-item>
            <text:p text:style-name="P8">is only ~20 lines of JS</text:p>
          </text:list-item>
        </text:list>
        <text:p text:style-name="P2">Just say the word.</text:p>
        <text:p text:style-name="P2">But the version above is the <text:span text:style-name="Strong_20_Emphasis">correct, editor‑grade</text:span> solution.</text:p>
      </text:section>
      <text:section text:style-name="Sect1" text:name="LnMmxaqLhTTjWctgKk8fY-user-message">
        <text:p text:style-name="P1">I was going to ask about the 'column' attribute in the current search. We make it '1' in every case, but it doesn't seem to matter. Even when there are 2 matches on one line, the navigator happily goes from one to the other, marking in yellow or orange as it should. In your 'editor grade' code above, what is 'column' exactly? Is it an offset into each line of the match, and if so, is it the offset into the plain, non-tagged line, or taking all the &lt;span...&gt; tags into account?</text:p>
      </text:section>
      <text:section text:style-name="Sect1" text:name="Y1ie15Wpp4keVHfqjyNwF-content-0">
        <text:p text:style-name="P2">Great question — and you’ve already intuited the key point: <text:span text:style-name="Strong_20_Emphasis">your current “column = 1” works only because your JS search engine is doing </text:span><text:span text:style-name="Emphasis"><text:span text:style-name="Strong_20_Emphasis">substring</text:span></text:span><text:span text:style-name="Strong_20_Emphasis"> matching, not positional matching</text:span>. Once you move to the editor‑grade positional highlighter, the meaning of “column” becomes precise and important.</text:p>
        <text:p text:style-name="P2">Let me break it down cleanly.</text:p>
        <text:h text:style-name="Heading_20_1" text:outline-level="1">⭐ What “column” means in the editor‑grade model</text:h>
        <text:p text:style-name="P2">In the robust version I outlined, <text:span text:style-name="Strong_20_Emphasis">column is the character offset into the </text:span><text:span text:style-name="Emphasis"><text:span text:style-name="Strong_20_Emphasis">plain, untagged</text:span></text:span><text:span text:style-name="Strong_20_Emphasis"> source line</text:span>.</text:p>
        <text:p text:style-name="P2">That is:</text:p>
        <text:list text:style-name="L5">
          <text:list-item>
            <text:p text:style-name="P9"><text:span text:style-name="Strong_20_Emphasis">before HTML encoding</text:span></text:p>
          </text:list-item>
          <text:list-item>
            <text:p text:style-name="P9"><text:span text:style-name="Strong_20_Emphasis">before syntax highlighting</text:span></text:p>
          </text:list-item>
          <text:list-item>
            <text:p text:style-name="P9"><text:span text:style-name="Strong_20_Emphasis">before wrapping in </text:span><text:span text:style-name="Source_20_Text">&lt;span class="var"&gt;…&lt;/span&gt;</text:span></text:p>
          </text:list-item>
          <text:list-item>
            <text:p text:style-name="P9"><text:span text:style-name="Strong_20_Emphasis">before any </text:span><text:span text:style-name="Source_20_Text">&lt;span class="kw"&gt;</text:span><text:span text:style-name="Strong_20_Emphasis">, </text:span><text:span text:style-name="Source_20_Text">&lt;span class="str"&gt;</text:span><text:span text:style-name="Strong_20_Emphasis">, etc.</text:span></text:p>
          </text:list-item>
        </text:list>
        <text:p text:style-name="P2">It is the offset into the <text:span text:style-name="Strong_20_Emphasis">raw BBC BASIC source line</text:span>, exactly as the user wrote it.</text:p>
        <text:p text:style-name="P2">Example:</text:p>
        <text:p text:style-name="Text_20_body">Code</text:p>
        <text:p text:style-name="P7"><text:span text:style-name="Source_20_Text">10 A%=FNwrite(B$)</text:span></text:p>
        <text:p text:style-name="P10"><text:span text:style-name="Source_20_Text"><text:s text:c="3"/>012345678901234567 <text:s/>← raw character positions</text:span></text:p>
        <text:p text:style-name="P2">If the semantic engine finds <text:span text:style-name="Source_20_Text">write</text:span> starting at column 5, then:</text:p>
        <text:p text:style-name="Text_20_body">json</text:p>
        <text:p text:style-name="P5"><text:span text:style-name="Source_20_Text">{ "line": 10, "columnStart": 5, "length": 5 }</text:span></text:p>
        <text:p text:style-name="P2"><text:soft-page-break/>That is what JS receives.</text:p>
        <text:h text:style-name="Heading_20_1" text:outline-level="1">⭐ Why we MUST use offsets into the <text:span text:style-name="Emphasis">raw</text:span> line</text:h>
        <text:p text:style-name="P2">Because the HTML version of the line is <text:span text:style-name="Strong_20_Emphasis">not stable</text:span>:</text:p>
        <text:list text:style-name="L6">
          <text:list-item>
            <text:p text:style-name="P11">syntax highlighting wraps tokens in spans</text:p>
          </text:list-item>
          <text:list-item>
            <text:p text:style-name="P11">search highlighting wraps matches in spans</text:p>
          </text:list-item>
          <text:list-item>
            <text:p text:style-name="P11">clearing highlights unwraps spans</text:p>
          </text:list-item>
          <text:list-item>
            <text:p text:style-name="P11">spans may be nested</text:p>
          </text:list-item>
          <text:list-item>
            <text:p text:style-name="P11">whitespace may be normalised</text:p>
          </text:list-item>
          <text:list-item>
            <text:p text:style-name="P11">HTML entities (<text:span text:style-name="Source_20_Text">&amp;lt;</text:span>, <text:span text:style-name="Source_20_Text">&amp;gt;</text:span>, <text:span text:style-name="Source_20_Text">&amp;amp;</text:span>) change character counts</text:p>
          </text:list-item>
          <text:list-item>
            <text:p text:style-name="P11">your <text:span text:style-name="Source_20_Text">&lt;span class="var"&gt;</text:span> wrappers change structure</text:p>
          </text:list-item>
          <text:list-item>
            <text:p text:style-name="P11">folding markers add extra DOM nodes</text:p>
          </text:list-item>
        </text:list>
        <text:p text:style-name="P2">If you tried to use offsets into the <text:span text:style-name="Strong_20_Emphasis">HTML</text:span>, everything would break the moment:</text:p>
        <text:list text:style-name="L7">
          <text:list-item>
            <text:p text:style-name="P12">a highlight is applied</text:p>
          </text:list-item>
          <text:list-item>
            <text:p text:style-name="P12">a highlight is cleared</text:p>
          </text:list-item>
          <text:list-item>
            <text:p text:style-name="P12">syntax highlighting changes</text:p>
          </text:list-item>
          <text:list-item>
            <text:p text:style-name="P12">a span is nested</text:p>
          </text:list-item>
          <text:list-item>
            <text:p text:style-name="P12">a span is removed</text:p>
          </text:list-item>
          <text:list-item>
            <text:p text:style-name="P12">a line wraps</text:p>
          </text:list-item>
        </text:list>
        <text:p text:style-name="P2">So the only stable coordinate system is:</text:p>
        <text:p text:style-name="P13"><text:span text:style-name="Strong_20_Emphasis">The raw text of the line before any HTML is generated.</text:span></text:p>
        <text:p text:style-name="P2">That’s why the editor‑grade approach uses a <text:span text:style-name="Source_20_Text">TreeWalker</text:span> to walk the DOM and find the correct text node corresponding to the raw offset.</text:p>
        <text:h text:style-name="Heading_20_1" text:outline-level="1">⭐ Why your current system “works” even with column = 1</text:h>
        <text:p text:style-name="P2">Because your current JS search engine:</text:p>
        <text:list text:style-name="L8">
          <text:list-item>
            <text:p text:style-name="P14">searches for substrings</text:p>
          </text:list-item>
          <text:list-item>
            <text:p text:style-name="P14">ignores positions</text:p>
          </text:list-item>
          <text:list-item>
            <text:p text:style-name="P14">highlights every occurrence</text:p>
          </text:list-item>
          <text:list-item>
            <text:p text:style-name="P14">then your C# navigator only <text:span text:style-name="Emphasis">moves between the semantic matches</text:span></text:p>
          </text:list-item>
          <text:list-item>
            <text:p text:style-name="P14">but the JS highlight still paints everything yellow</text:p>
          </text:list-item>
        </text:list>
        <text:p text:style-name="P2"><text:soft-page-break/>So the “column” field is currently unused.</text:p>
        <text:p text:style-name="P2">That’s why you can set it to 1 and nothing breaks.</text:p>
        <text:h text:style-name="Heading_20_1" text:outline-level="1">⭐ In the editor‑grade version, column = raw offset</text:h>
        <text:p text:style-name="P2">Example:</text:p>
        <text:p text:style-name="P2">Raw line:</text:p>
        <text:p text:style-name="Text_20_body">Code</text:p>
        <text:p text:style-name="P7"><text:span text:style-name="Source_20_Text">PROCwritename</text:span></text:p>
        <text:p text:style-name="P10"><text:span text:style-name="Source_20_Text">0123456789012</text:span></text:p>
        <text:p text:style-name="P2">Semantic match for <text:span text:style-name="Source_20_Text">write</text:span>:</text:p>
        <text:list text:style-name="L9">
          <text:list-item>
            <text:p text:style-name="P15">start = 4</text:p>
          </text:list-item>
          <text:list-item>
            <text:p text:style-name="P15">length = 5</text:p>
          </text:list-item>
        </text:list>
        <text:p text:style-name="P2">You send:</text:p>
        <text:p text:style-name="Text_20_body">json</text:p>
        <text:p text:style-name="P5"><text:span text:style-name="Source_20_Text">{ "line": 200, "columnStart": 4, "length": 5 }</text:span></text:p>
        <text:p text:style-name="P2">JS walks the DOM for that line, finds the correct text node, and wraps exactly those characters.</text:p>
        <text:h text:style-name="Heading_20_1" text:outline-level="1">⭐ Summary (the important bit)</text:h>
        <text:h text:style-name="Heading_20_3" text:outline-level="3">✔ “column” = offset into the <text:span text:style-name="Strong_20_Emphasis">raw, untagged BBC BASIC line</text:span></text:h>
        <text:h text:style-name="Heading_20_3" text:outline-level="3">✔ NOT into the HTML</text:h>
        <text:h text:style-name="Heading_20_3" text:outline-level="3">✔ NOT counting <text:span text:style-name="Source_20_Text">&lt;span&gt;</text:span> tags</text:h>
        <text:h text:style-name="Heading_20_3" text:outline-level="3">✔ NOT counting syntax highlighting</text:h>
        <text:h text:style-name="Heading_20_3" text:outline-level="3">✔ NOT counting search highlighting</text:h>
        <text:p text:style-name="P2">This is the only coordinate system that survives:</text:p>
        <text:list text:style-name="L10">
          <text:list-item>
            <text:p text:style-name="P16">syntax highlighting</text:p>
          </text:list-item>
          <text:list-item>
            <text:p text:style-name="P16">search highlighting</text:p>
          </text:list-item>
          <text:list-item>
            <text:p text:style-name="P16">clearing</text:p>
          </text:list-item>
          <text:list-item>
            <text:p text:style-name="P16">re-highlighting</text:p>
          </text:list-item>
          <text:list-item>
            <text:p text:style-name="P16">DOM mutations</text:p>
          </text:list-item>
          <text:list-item>
            <text:p text:style-name="P16">wrapping</text:p>
          </text:list-item>
          <text:list-item>
            <text:p text:style-name="P16"><text:soft-page-break/>folding</text:p>
          </text:list-item>
          <text:list-item>
            <text:p text:style-name="P16">HTML entity encoding</text:p>
          </text:list-item>
        </text:list>
        <text:p text:style-name="P2">If you want, I can give you a <text:span text:style-name="Strong_20_Emphasis">drop‑in C# helper</text:span> that computes:</text:p>
        <text:list text:style-name="L11">
          <text:list-item>
            <text:p text:style-name="P17">line number</text:p>
          </text:list-item>
          <text:list-item>
            <text:p text:style-name="P17">raw column offset</text:p>
          </text:list-item>
          <text:list-item>
            <text:p text:style-name="P17">match length</text:p>
          </text:list-item>
        </text:list>
        <text:p text:style-name="P2">directly from your semantic symbol table, ready to send to JS.</text:p>
      </text:section>
      <text:section text:style-name="Sect1" text:name="2moe7Dr9GARF2AxLf4h9s-user-message">
        <text:p text:style-name="P1">OK. Given a SymbolInfo object, which gives you .Name and .Kind (the latter a SymbolKind object), the list of Uses (SymbolUse objects) gives you .LineNumber -- an int which is the Basic Line number, NOT an index into ProgramLines. When searching ProgramLines, you can stop once you exceed LineNumber and treat it as Not Found. (Basic line numbers are in order unless the program is corrupt, usually.) The HTML is created from a list of DisplayLines: use PlainLine for offsets. public class DisplayLine { public int Linenumber { get; set; } = 0; public int Indent { get; set; } = 0; private bool _defIndent = false; public bool IsDef { get; set; } = false; public bool IsInDef { get; set; } = false; public string sLineNumber { get; set; } = ""; public string LineBody { get; set; } = ""; public string PlainLine { get; set; } = ""; public DisplayLine(int lineno) { Linenumber = lineno; }</text:p>
      </text:section>
      <text:section text:style-name="Sect1" text:name="une9w93kuJ54rpWhJyaSz-content-0">
        <text:p text:style-name="P2">Right — now we can wire the whole thing together cleanly. You’ve given me exactly the pieces I needed:</text:p>
        <text:list text:style-name="L12">
          <text:list-item>
            <text:p text:style-name="P18"><text:span text:style-name="Strong_20_Emphasis">SymbolInfo</text:span> gives you <text:span text:style-name="Source_20_Text">.Name</text:span>, <text:span text:style-name="Source_20_Text">.Kind</text:span>, and a list of <text:span text:style-name="Strong_20_Emphasis">SymbolUse</text:span> entries.</text:p>
          </text:list-item>
          <text:list-item>
            <text:p text:style-name="P18">Each <text:span text:style-name="Strong_20_Emphasis">SymbolUse</text:span> has a <text:span text:style-name="Strong_20_Emphasis">BBC BASIC line number</text:span>, <text:span text:style-name="Emphasis">not</text:span> an index.</text:p>
          </text:list-item>
          <text:list-item>
            <text:p text:style-name="P18">Your HTML is generated from a list of <text:span text:style-name="Strong_20_Emphasis">DisplayLine</text:span>, each with:</text:p>
            <text:list>
              <text:list-item>
                <text:p text:style-name="P18"><text:span text:style-name="Source_20_Text">Linenumber</text:span> (BBC BASIC line number)</text:p>
              </text:list-item>
              <text:list-item>
                <text:p text:style-name="P18"><text:span text:style-name="Source_20_Text">PlainLine</text:span> (the raw text used for offset calculations)</text:p>
              </text:list-item>
            </text:list>
          </text:list-item>
        </text:list>
        <text:p text:style-name="P2">So the job is:</text:p>
        <text:p text:style-name="P13"><text:span text:style-name="Strong_20_Emphasis">Given a SymbolInfo, produce a list of (lineNumber, columnStart, length) matches, using PlainLine for offsets.</text:span></text:p>
        <text:p text:style-name="P2">This is exactly what your editor‑grade JS highlighter needs.</text:p>
        <text:p text:style-name="P2">Below is the clean, robust helper that does it.</text:p>
        <text:h text:style-name="Heading_20_1" text:outline-level="1">⭐ The helper: extract raw match positions from SymbolInfo</text:h>
        <text:p text:style-name="Text_20_body">csharp</text:p>
        <text:p text:style-name="P7"><text:span text:style-name="Source_20_Text">public static IEnumerable&lt;SearchMatch&gt; GetMatchesForSymbol(</text:span></text:p>
        <text:p text:style-name="Preformatted_20_Text"><text:span text:style-name="Source_20_Text"><text:s text:c="4"/>SymbolInfo sym,</text:span></text:p>
        <text:p text:style-name="P7"><text:span text:style-name="Source_20_Text"><text:s text:c="4"/>IReadOnlyList&lt;DisplayLine&gt; displayLines)</text:span></text:p>
        <text:p text:style-name="P7"><text:span text:style-name="Source_20_Text">{</text:span></text:p>
        <text:p text:style-name="P7"><text:span text:style-name="Source_20_Text"><text:s text:c="4"/>string name = sym.Name;</text:span></text:p>
        <text:p text:style-name="P7"><text:span text:style-name="Source_20_Text"><text:s text:c="4"/>int nameLength = name.Length;</text:span></text:p>
        <text:p text:style-name="Preformatted_20_Text"/>
        <text:p text:style-name="P7"><text:span text:style-name="Source_20_Text"><text:s text:c="4"/>foreach (var use in sym.Uses)</text:span></text:p>
        <text:p text:style-name="P7"><text:soft-page-break/><text:span text:style-name="Source_20_Text"><text:s text:c="4"/>{</text:span></text:p>
        <text:p text:style-name="P7"><text:span text:style-name="Source_20_Text"><text:s text:c="8"/>int targetLine = use.LineNumber;</text:span></text:p>
        <text:p text:style-name="Preformatted_20_Text"/>
        <text:p text:style-name="P7"><text:span text:style-name="Source_20_Text"><text:s text:c="8"/>// Find the DisplayLine with this BASIC line number</text:span></text:p>
        <text:p text:style-name="P7"><text:span text:style-name="Source_20_Text"><text:s text:c="8"/>// (stop early because BASIC lines are sorted)</text:span></text:p>
        <text:p text:style-name="P7"><text:span text:style-name="Source_20_Text"><text:s text:c="8"/>DisplayLine? dl = null;</text:span></text:p>
        <text:p text:style-name="P7"><text:span text:style-name="Source_20_Text"><text:s text:c="8"/>foreach (var line in displayLines)</text:span></text:p>
        <text:p text:style-name="P7"><text:span text:style-name="Source_20_Text"><text:s text:c="8"/>{</text:span></text:p>
        <text:p text:style-name="P7"><text:span text:style-name="Source_20_Text"><text:s text:c="12"/>if (line.Linenumber == targetLine)</text:span></text:p>
        <text:p text:style-name="P7"><text:span text:style-name="Source_20_Text"><text:s text:c="12"/>{</text:span></text:p>
        <text:p text:style-name="P7"><text:span text:style-name="Source_20_Text"><text:s text:c="16"/>dl = line;</text:span></text:p>
        <text:p text:style-name="P7"><text:span text:style-name="Source_20_Text"><text:s text:c="16"/>break;</text:span></text:p>
        <text:p text:style-name="P7"><text:span text:style-name="Source_20_Text"><text:s text:c="12"/>}</text:span></text:p>
        <text:p text:style-name="P7"><text:span text:style-name="Source_20_Text"><text:s text:c="12"/>if (line.Linenumber &gt; targetLine)</text:span></text:p>
        <text:p text:style-name="P7"><text:span text:style-name="Source_20_Text"><text:s text:c="16"/>break;</text:span></text:p>
        <text:p text:style-name="P7"><text:span text:style-name="Source_20_Text"><text:s text:c="8"/>}</text:span></text:p>
        <text:p text:style-name="Preformatted_20_Text"/>
        <text:p text:style-name="P7"><text:span text:style-name="Source_20_Text"><text:s text:c="8"/>if (dl == null)</text:span></text:p>
        <text:p text:style-name="P7"><text:span text:style-name="Source_20_Text"><text:s text:c="12"/>continue; // should not happen unless program is corrupt</text:span></text:p>
        <text:p text:style-name="Preformatted_20_Text"/>
        <text:p text:style-name="P7"><text:span text:style-name="Source_20_Text"><text:s text:c="8"/>string raw = dl.PlainLine;</text:span></text:p>
        <text:p text:style-name="P7"><text:span text:style-name="Source_20_Text"><text:s text:c="8"/>if (string.IsNullOrEmpty(raw))</text:span></text:p>
        <text:p text:style-name="P7"><text:span text:style-name="Source_20_Text"><text:s text:c="12"/>continue;</text:span></text:p>
        <text:p text:style-name="Preformatted_20_Text"/>
        <text:p text:style-name="P7"><text:span text:style-name="Source_20_Text"><text:s text:c="8"/>// Find the symbol name inside the raw line</text:span></text:p>
        <text:p text:style-name="P7"><text:span text:style-name="Source_20_Text"><text:s text:c="8"/>int idx = raw.IndexOf(name, StringComparison.Ordinal);</text:span></text:p>
        <text:p text:style-name="P7"><text:span text:style-name="Source_20_Text"><text:s text:c="8"/>if (idx &lt; 0)</text:span></text:p>
        <text:p text:style-name="P7"><text:span text:style-name="Source_20_Text"><text:s text:c="12"/>continue; // symbol not found in this line (rare but possible)</text:span></text:p>
        <text:p text:style-name="Preformatted_20_Text"/>
        <text:p text:style-name="P7"><text:span text:style-name="Source_20_Text"><text:s text:c="8"/>yield return new SearchMatch</text:span></text:p>
        <text:p text:style-name="P7"><text:span text:style-name="Source_20_Text"><text:s text:c="8"/>{</text:span></text:p>
        <text:p text:style-name="P7"><text:span text:style-name="Source_20_Text"><text:s text:c="12"/>LineNumber = targetLine,</text:span></text:p>
        <text:p text:style-name="P7"><text:span text:style-name="Source_20_Text"><text:s text:c="12"/>ColumnStart = idx,</text:span></text:p>
        <text:p text:style-name="P7"><text:span text:style-name="Source_20_Text"><text:s text:c="12"/>Length = nameLength</text:span></text:p>
        <text:p text:style-name="P7"><text:span text:style-name="Source_20_Text"><text:s text:c="8"/>};</text:span></text:p>
        <text:p text:style-name="P7"><text:span text:style-name="Source_20_Text"><text:s text:c="4"/>}</text:span></text:p>
        <text:p text:style-name="P5"><text:span text:style-name="Source_20_Text">}</text:span></text:p>
        <text:p text:style-name="P2">This gives you <text:span text:style-name="Strong_20_Emphasis">exact raw offsets</text:span>, which the JS highlighter can apply safely.</text:p>
        <text:h text:style-name="Heading_20_1" text:outline-level="1">⭐ Why this works</text:h>
        <text:h text:style-name="Heading_20_3" text:outline-level="3">✔ Uses the semantic engine</text:h>
        <text:p text:style-name="P2">You only highlight the exact symbol uses your analyser found.</text:p>
        <text:h text:style-name="Heading_20_3" text:outline-level="3">✔ Uses <text:span text:style-name="Source_20_Text">PlainLine</text:span></text:h>
        <text:p text:style-name="P2">Offsets are computed from the <text:span text:style-name="Emphasis">raw</text:span> line, not the HTML.</text:p>
        <text:h text:style-name="Heading_20_3" text:outline-level="3">✔ Uses BASIC line numbers</text:h>
        <text:p text:style-name="P2">You stop scanning early because DisplayLines are sorted by <text:span text:style-name="Source_20_Text">Linenumber</text:span>.</text:p>
        <text:h text:style-name="Heading_20_3" text:outline-level="3">✔ Handles multiple matches on the same line</text:h>
        <text:p text:style-name="P2">If a symbol appears twice on one line, you’ll get two SymbolUse entries.</text:p>
        <text:h text:style-name="Heading_20_3" text:outline-level="3"><text:soft-page-break/>✔ Produces exactly what the JS highlighter needs</text:h>
        <text:p text:style-name="P2"><text:span text:style-name="Source_20_Text">LineNumber</text:span>, <text:span text:style-name="Source_20_Text">ColumnStart</text:span>, <text:span text:style-name="Source_20_Text">Length</text:span>.</text:p>
        <text:h text:style-name="Heading_20_1" text:outline-level="1">⭐ The SearchMatch class (if you need it)</text:h>
        <text:p text:style-name="Text_20_body">csharp</text:p>
        <text:p text:style-name="P7"><text:span text:style-name="Source_20_Text">public class SearchMatch</text:span></text:p>
        <text:p text:style-name="P7"><text:span text:style-name="Source_20_Text">{</text:span></text:p>
        <text:p text:style-name="P7"><text:span text:style-name="Source_20_Text"><text:s text:c="4"/>public int LineNumber { get; set; }</text:span></text:p>
        <text:p text:style-name="P7"><text:span text:style-name="Source_20_Text"><text:s text:c="4"/>public int ColumnStart { get; set; }</text:span></text:p>
        <text:p text:style-name="P7"><text:span text:style-name="Source_20_Text"><text:s text:c="4"/>public int Length { get; set; }</text:span></text:p>
        <text:p text:style-name="P5"><text:span text:style-name="Source_20_Text">}</text:span></text:p>
        <text:h text:style-name="Heading_20_1" text:outline-level="1">⭐ How to use it</text:h>
        <text:p text:style-name="Text_20_body">csharp</text:p>
        <text:p text:style-name="P7"><text:span text:style-name="Source_20_Text">var matches = GetMatchesForSymbol(symInfo, displayLines).ToList();</text:span></text:p>
        <text:p text:style-name="Preformatted_20_Text"/>
        <text:p text:style-name="P7"><text:span text:style-name="Source_20_Text">var json = JsonSerializer.Serialize(matches);</text:span></text:p>
        <text:p text:style-name="P7"><text:span text:style-name="Source_20_Text">await webView2.CoreWebView2.ExecuteScriptAsync(</text:span></text:p>
        <text:p text:style-name="P5"><text:span text:style-name="Source_20_Text"><text:s text:c="4"/>$"window.search.applyMatches({json});");</text:span></text:p>
        <text:h text:style-name="Heading_20_1" text:outline-level="1">⭐ This is now a complete pipeline</text:h>
        <text:list text:style-name="L13">
          <text:list-item>
            <text:p text:style-name="P19"><text:span text:style-name="Strong_20_Emphasis">C# semantic engine</text:span> finds symbol uses</text:p>
          </text:list-item>
          <text:list-item>
            <text:p text:style-name="P19"><text:span text:style-name="Strong_20_Emphasis">GetMatchesForSymbol</text:span> converts them to raw offsets</text:p>
          </text:list-item>
          <text:list-item>
            <text:p text:style-name="P19"><text:span text:style-name="Strong_20_Emphasis">JS applyMatches</text:span> highlights exactly those positions</text:p>
          </text:list-item>
          <text:list-item>
            <text:p text:style-name="P19"><text:span text:style-name="Strong_20_Emphasis">SearchNavControl</text:span> navigates between them</text:p>
          </text:list-item>
          <text:list-item>
            <text:p text:style-name="P19">No false positives</text:p>
          </text:list-item>
          <text:list-item>
            <text:p text:style-name="P19">No span‑boundary issues</text:p>
          </text:list-item>
          <text:list-item>
            <text:p text:style-name="P19">No DOM drift</text:p>
          </text:list-item>
          <text:list-item>
            <text:p text:style-name="P19">No substring search in JS at all</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aramond" svg:font-family="Garamond"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lgun Gothic" svg:font-family="'Malgun Gothic'" style:font-family-generic="swiss"/>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aramond" fo:font-size="12pt" fo:language="en" fo:country="GB" style:letter-kerning="true" style:font-name-asian="Noto Serif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Garamond" fo:font-size="12pt" fo:language="en" fo:country="GB" style:letter-kerning="true" style:font-name-asian="Noto Serif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aramond" fo:font-family="Garamond"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SC" style:font-family-asian="'Noto Serif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C Rowland</meta:initial-creator>
    <meta:creation-date>2026-07-10T22:05:54.475893300</meta:creation-date>
    <dc:date>2026-07-10T22:06:40.498177900</dc:date>
    <dc:creator>A C Rowland</dc:creator>
    <meta:editing-duration>PT48S</meta:editing-duration>
    <meta:editing-cycles>1</meta:editing-cycles>
    <meta:document-statistic meta:table-count="0" meta:image-count="0" meta:object-count="0" meta:page-count="9" meta:paragraph-count="265" meta:word-count="1905" meta:character-count="12184" meta:non-whitespace-character-count="9883"/>
    <meta:generator>LibreOffice/26.2.4.2$Windows_X86_64 LibreOffice_project/0229ac93fcf0d7cbc6376066c6f35021cef002dc</meta:generator>
  </office:meta>
</office:document-meta>
</file>