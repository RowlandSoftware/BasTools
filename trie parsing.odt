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aramond" svg:font-family="Garamond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lgun Gothic" svg:font-family="'Malgun Gothic'" style:font-family-generic="swiss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uild the trie from your <text:span text:style-name="Source_20_Text">keywords</text:span> list</text:h>
      <text:p text:style-name="P1">Drop this class into your project:</text:p>
      <text:p text:style-name="Text_20_body">csharp</text:p>
      <text:p text:style-name="P2"><text:span text:style-name="Source_20_Text">class TrieNode</text:span></text:p>
      <text:p text:style-name="P2"><text:span text:style-name="Source_20_Text">{</text:span></text:p>
      <text:p text:style-name="P2"><text:span text:style-name="Source_20_Text"><text:s text:c="4"/>public readonly Dictionary&lt;char, TrieNode&gt; Children = new();</text:span></text:p>
      <text:p text:style-name="P2"><text:span text:style-name="Source_20_Text"><text:s text:c="4"/>public string? Keyword; <text:s text:c="2"/>// non-null means this node ends a keyword</text:span></text:p>
      <text:p text:style-name="P2"><text:span text:style-name="Source_20_Text">}</text:span></text:p>
      <text:p text:style-name="Preformatted_20_Text"/>
      <text:p text:style-name="P2"><text:span text:style-name="Source_20_Text">class KeywordTrie</text:span></text:p>
      <text:p text:style-name="P2"><text:span text:style-name="Source_20_Text">{</text:span></text:p>
      <text:p text:style-name="P2"><text:span text:style-name="Source_20_Text"><text:s text:c="4"/>private readonly TrieNode root = new();</text:span></text:p>
      <text:p text:style-name="Preformatted_20_Text"/>
      <text:p text:style-name="P2"><text:span text:style-name="Source_20_Text"><text:s text:c="4"/>public void Add(string keyword)</text:span></text:p>
      <text:p text:style-name="P2"><text:span text:style-name="Source_20_Text"><text:s text:c="4"/>{</text:span></text:p>
      <text:p text:style-name="P2"><text:span text:style-name="Source_20_Text"><text:s text:c="8"/>var node = root;</text:span></text:p>
      <text:p text:style-name="P2"><text:span text:style-name="Source_20_Text"><text:s text:c="8"/>foreach (char c in keyword)</text:span></text:p>
      <text:p text:style-name="P2"><text:span text:style-name="Source_20_Text"><text:s text:c="8"/>{</text:span></text:p>
      <text:p text:style-name="P2"><text:span text:style-name="Source_20_Text"><text:s text:c="12"/>if (!node.Children.TryGetValue(c, out var next))</text:span></text:p>
      <text:p text:style-name="P2"><text:span text:style-name="Source_20_Text"><text:s text:c="16"/>node.Children[c] = next = new TrieNode();</text:span></text:p>
      <text:p text:style-name="P2"><text:span text:style-name="Source_20_Text"><text:s text:c="12"/>node = next;</text:span></text:p>
      <text:p text:style-name="P2"><text:span text:style-name="Source_20_Text"><text:s text:c="8"/>}</text:span></text:p>
      <text:p text:style-name="P2"><text:span text:style-name="Source_20_Text"><text:s text:c="8"/>node.Keyword = keyword;</text:span></text:p>
      <text:p text:style-name="P2"><text:span text:style-name="Source_20_Text"><text:s text:c="4"/>}</text:span></text:p>
      <text:p text:style-name="Preformatted_20_Text"/>
      <text:p text:style-name="P2"><text:span text:style-name="Source_20_Text"><text:s text:c="4"/>// Returns the longest keyword that matches at the start of 'text'</text:span></text:p>
      <text:p text:style-name="P2"><text:span text:style-name="Source_20_Text"><text:s text:c="4"/>public string? Match(ReadOnlySpan&lt;char&gt; text)</text:span></text:p>
      <text:p text:style-name="P2"><text:span text:style-name="Source_20_Text"><text:s text:c="4"/>{</text:span></text:p>
      <text:p text:style-name="P2"><text:span text:style-name="Source_20_Text"><text:s text:c="8"/>var node = root;</text:span></text:p>
      <text:p text:style-name="P2"><text:span text:style-name="Source_20_Text"><text:s text:c="8"/>string? lastMatch = null;</text:span></text:p>
      <text:p text:style-name="Preformatted_20_Text"/>
      <text:p text:style-name="P2"><text:span text:style-name="Source_20_Text"><text:s text:c="8"/>foreach (char c in text)</text:span></text:p>
      <text:p text:style-name="P2"><text:span text:style-name="Source_20_Text"><text:s text:c="8"/>{</text:span></text:p>
      <text:p text:style-name="P2"><text:span text:style-name="Source_20_Text"><text:s text:c="12"/>if (!node.Children.TryGetValue(c, out node))</text:span></text:p>
      <text:p text:style-name="P2"><text:span text:style-name="Source_20_Text"><text:s text:c="16"/>break;</text:span></text:p>
      <text:p text:style-name="Preformatted_20_Text"/>
      <text:p text:style-name="P2"><text:span text:style-name="Source_20_Text"><text:s text:c="12"/>if (node.Keyword != null)</text:span></text:p>
      <text:p text:style-name="P2"><text:span text:style-name="Source_20_Text"><text:s text:c="16"/>lastMatch = node.Keyword;</text:span></text:p>
      <text:p text:style-name="P2"><text:span text:style-name="Source_20_Text"><text:s text:c="8"/>}</text:span></text:p>
      <text:p text:style-name="Preformatted_20_Text"/>
      <text:p text:style-name="P2"><text:span text:style-name="Source_20_Text"><text:s text:c="8"/>return lastMatch;</text:span></text:p>
      <text:p text:style-name="P2"><text:span text:style-name="Source_20_Text"><text:s text:c="4"/>}</text:span></text:p>
      <text:p text:style-name="P3"><text:span text:style-name="Source_20_Text">}</text:span></text:p>
      <text:p text:style-name="P1">This trie guarantees:</text:p>
      <text:list text:style-name="L1">
        <text:list-item>
          <text:p text:style-name="P4"><text:span text:style-name="Strong_20_Emphasis">longest match wins</text:span></text:p>
        </text:list-item>
        <text:list-item>
          <text:p text:style-name="P4"><text:span text:style-name="Strong_20_Emphasis">no false positives</text:span></text:p>
        </text:list-item>
        <text:list-item>
          <text:p text:style-name="P4"><text:span text:style-name="Strong_20_Emphasis">no index juggling</text:span></text:p>
        </text:list-item>
        <text:list-item>
          <text:p text:style-name="P4"><text:span text:style-name="Strong_20_Emphasis">O(n)</text:span> scanning</text:p>
        </text:list-item>
      </text:list>
      <text:h text:style-name="Heading_20_2" text:outline-level="2">Build the trie once at startup</text:h>
      <text:p text:style-name="Text_20_body">csharp</text:p>
      <text:p text:style-name="P2"><text:span text:style-name="Source_20_Text">private static readonly KeywordTrie trie = new();</text:span></text:p>
      <text:p text:style-name="Preformatted_20_Text"><text:soft-page-break/></text:p>
      <text:p text:style-name="P2"><text:span text:style-name="Source_20_Text">static YourClassConstructor()</text:span></text:p>
      <text:p text:style-name="P2"><text:span text:style-name="Source_20_Text">{</text:span></text:p>
      <text:p text:style-name="P2"><text:span text:style-name="Source_20_Text"><text:s text:c="4"/>foreach (var kw in keywords)</text:span></text:p>
      <text:p text:style-name="P2"><text:span text:style-name="Source_20_Text"><text:s text:c="8"/>trie.Add(kw);</text:span></text:p>
      <text:p text:style-name="P3"><text:span text:style-name="Source_20_Text">}</text:span></text:p>
      <text:p text:style-name="P1">This replaces your sorted keyword list entirely.</text:p>
      <text:h text:style-name="Heading_20_2" text:outline-level="2">⭐ 3. Integrate the trie into <text:span text:style-name="Source_20_Text">parseTextLine</text:span></text:h>
      <text:p text:style-name="P1">Here is the corrected, stable version of your loop using the trie:</text:p>
      <text:p text:style-name="Text_20_body">csharp</text:p>
      <text:p text:style-name="P2"><text:span text:style-name="Source_20_Text">for (int i = 0; i &lt; textLine.Length; i++)</text:span></text:p>
      <text:p text:style-name="P2"><text:span text:style-name="Source_20_Text">{</text:span></text:p>
      <text:p text:style-name="P2"><text:span text:style-name="Source_20_Text"><text:s text:c="4"/>// Try keyword match</text:span></text:p>
      <text:p text:style-name="P2"><text:span text:style-name="Source_20_Text"><text:s text:c="4"/>string? keyword = trie.Match(textLine.AsSpan(i));</text:span></text:p>
      <text:p text:style-name="Preformatted_20_Text"/>
      <text:p text:style-name="P2"><text:span text:style-name="Source_20_Text"><text:s text:c="4"/>if (keyword != null)</text:span></text:p>
      <text:p text:style-name="P2"><text:span text:style-name="Source_20_Text"><text:s text:c="4"/>{</text:span></text:p>
      <text:p text:style-name="P2"><text:span text:style-name="Source_20_Text"><text:s text:c="8"/>output.Append(SemanticTags.Keyword + keyword + SemanticTags.Reset);</text:span></text:p>
      <text:p text:style-name="Preformatted_20_Text"/>
      <text:p text:style-name="P2"><text:span text:style-name="Source_20_Text"><text:s text:c="8"/>if (IsDef)</text:span></text:p>
      <text:p text:style-name="P2"><text:span text:style-name="Source_20_Text"><text:s text:c="8"/>{</text:span></text:p>
      <text:p text:style-name="P2"><text:span text:style-name="Source_20_Text"><text:s text:c="12"/>if (keyword == "PROC")</text:span></text:p>
      <text:p text:style-name="P2"><text:span text:style-name="Source_20_Text"><text:s text:c="16"/>output.Append(SemanticTags.ProcName);</text:span></text:p>
      <text:p text:style-name="P2"><text:span text:style-name="Source_20_Text"><text:s text:c="12"/>else if (keyword == "FN")</text:span></text:p>
      <text:p text:style-name="P2"><text:span text:style-name="Source_20_Text"><text:s text:c="16"/>output.Append(SemanticTags.FunctionName);</text:span></text:p>
      <text:p text:style-name="P2"><text:span text:style-name="Source_20_Text"><text:s text:c="8"/>}</text:span></text:p>
      <text:p text:style-name="Preformatted_20_Text"/>
      <text:p text:style-name="P2"><text:span text:style-name="Source_20_Text"><text:s text:c="8"/>if (keyword == "DEF")</text:span></text:p>
      <text:p text:style-name="P2"><text:span text:style-name="Source_20_Text"><text:s text:c="8"/>{</text:span></text:p>
      <text:p text:style-name="P2"><text:span text:style-name="Source_20_Text"><text:s text:c="12"/>IsDef = true;</text:span></text:p>
      <text:p text:style-name="P2"><text:span text:style-name="Source_20_Text"><text:s text:c="12"/>IsDefLine = true;</text:span></text:p>
      <text:p text:style-name="P2"><text:span text:style-name="Source_20_Text"><text:s text:c="8"/>}</text:span></text:p>
      <text:p text:style-name="Preformatted_20_Text"/>
      <text:p text:style-name="P2"><text:span text:style-name="Source_20_Text"><text:s text:c="8"/>i += keyword.Length - 1; <text:s text:c="2"/>// advance to last char of keyword</text:span></text:p>
      <text:p text:style-name="P2"><text:span text:style-name="Source_20_Text"><text:s text:c="8"/>continue; <text:s text:c="17"/>// skip loop increment</text:span></text:p>
      <text:p text:style-name="P2"><text:span text:style-name="Source_20_Text"><text:s text:c="4"/>}</text:span></text:p>
      <text:p text:style-name="Preformatted_20_Text"/>
      <text:p text:style-name="P2"><text:span text:style-name="Source_20_Text"><text:s text:c="4"/>// STRING HANDLING</text:span></text:p>
      <text:p text:style-name="P2"><text:span text:style-name="Source_20_Text"><text:s text:c="4"/>if (textLine[i] == '"')</text:span></text:p>
      <text:p text:style-name="P2"><text:span text:style-name="Source_20_Text"><text:s text:c="4"/>{</text:span></text:p>
      <text:p text:style-name="P2"><text:span text:style-name="Source_20_Text"><text:s text:c="8"/>output.Append(SemanticTags.StringLiteral + '"');</text:span></text:p>
      <text:p text:style-name="P2"><text:span text:style-name="Source_20_Text"><text:s text:c="8"/>while (++i &lt; textLine.Length &amp;&amp; textLine[i] != '"')</text:span></text:p>
      <text:p text:style-name="P2"><text:span text:style-name="Source_20_Text"><text:s text:c="12"/>output.Append(textLine[i]);</text:span></text:p>
      <text:p text:style-name="P2"><text:span text:style-name="Source_20_Text"><text:s text:c="8"/>output.Append('"' + SemanticTags.Reset);</text:span></text:p>
      <text:p text:style-name="P2"><text:span text:style-name="Source_20_Text"><text:s text:c="8"/>continue;</text:span></text:p>
      <text:p text:style-name="P2"><text:span text:style-name="Source_20_Text"><text:s text:c="4"/>}</text:span></text:p>
      <text:p text:style-name="Preformatted_20_Text"/>
      <text:p text:style-name="P2"><text:span text:style-name="Source_20_Text"><text:s text:c="4"/>// END OF PROC/FN NAME</text:span></text:p>
      <text:p text:style-name="P2"><text:span text:style-name="Source_20_Text"><text:s text:c="4"/>if (IsDef &amp;&amp; (textLine[i] == ':' || textLine[i] == '('))</text:span></text:p>
      <text:p text:style-name="P2"><text:span text:style-name="Source_20_Text"><text:s text:c="4"/>{</text:span></text:p>
      <text:p text:style-name="P2"><text:span text:style-name="Source_20_Text"><text:s text:c="8"/>output.Append(SemanticTags.Reset + textLine[i]);</text:span></text:p>
      <text:p text:style-name="P2"><text:span text:style-name="Source_20_Text"><text:s text:c="8"/>IsDef = false;</text:span></text:p>
      <text:p text:style-name="P2"><text:span text:style-name="Source_20_Text"><text:s text:c="8"/>continue;</text:span></text:p>
      <text:p text:style-name="P2"><text:span text:style-name="Source_20_Text"><text:s text:c="4"/>}</text:span></text:p>
      <text:p text:style-name="Preformatted_20_Text"/>
      <text:p text:style-name="P2"><text:span text:style-name="Source_20_Text"><text:s text:c="4"/>// DEFAULT: copy character</text:span></text:p>
      <text:p text:style-name="P2"><text:span text:style-name="Source_20_Text"><text:s text:c="4"/>output.Append(textLine[i]);</text:span></text:p>
      <text:p text:style-name="P3"><text:soft-page-break/><text:span text:style-name="Source_20_Text">}</text:span></text:p>
      <text:h text:style-name="Heading_20_2" text:outline-level="2">⭐ 4. Why this fixes <text:span text:style-name="Emphasis">all</text:span> your previous issues</text:h>
      <text:h text:style-name="Heading_20_3" text:outline-level="3">✔ Adjacent keywords</text:h>
      <text:p text:style-name="P1"><text:span text:style-name="Source_20_Text">DEFPROCfoo</text:span> now becomes:</text:p>
      <text:list text:style-name="L2">
        <text:list-item>
          <text:p text:style-name="P5"><text:span text:style-name="Source_20_Text">DEF</text:span> matched</text:p>
        </text:list-item>
        <text:list-item>
          <text:p text:style-name="P5">trie continues</text:p>
        </text:list-item>
        <text:list-item>
          <text:p text:style-name="P5"><text:span text:style-name="Source_20_Text">PROC</text:span> matched</text:p>
        </text:list-item>
        <text:list-item>
          <text:p text:style-name="P5">name tagging begins</text:p>
        </text:list-item>
        <text:list-item>
          <text:p text:style-name="P5"><text:span text:style-name="Source_20_Text">create</text:span> or <text:span text:style-name="Source_20_Text">init</text:span> tagged correctly</text:p>
        </text:list-item>
        <text:list-item>
          <text:p text:style-name="P5">no stray resets</text:p>
        </text:list-item>
        <text:list-item>
          <text:p text:style-name="P5">no repeated characters</text:p>
        </text:list-item>
        <text:list-item>
          <text:p text:style-name="P5">no skipped characters</text:p>
        </text:list-item>
      </text:list>
      <text:h text:style-name="Heading_20_3" text:outline-level="3">✔ No more off‑by‑one errors</text:h>
      <text:p text:style-name="P1">The trie controls the match length; you never manually scan the keyword list.</text:p>
      <text:h text:style-name="Heading_20_3" text:outline-level="3">✔ No more substring allocations</text:h>
      <text:p text:style-name="P1"><text:span text:style-name="Source_20_Text">AsSpan(i)</text:span> is zero‑allocation.</text:p>
      <text:h text:style-name="Heading_20_3" text:outline-level="3">✔ No more “magic assembler register detection”</text:h>
      <text:p text:style-name="P1">It now happens <text:span text:style-name="Emphasis">intentionally</text:span> because the trie contains them.</text:p>
      <text:h text:style-name="Heading_20_2" text:outline-level="2">⭐ 5. You now have a real lexical scanner</text:h>
      <text:p text:style-name="P1">This is the first step toward:</text:p>
      <text:list text:style-name="L3">
        <text:list-item>
          <text:p text:style-name="P6">token stream design</text:p>
        </text:list-item>
        <text:list-item>
          <text:p text:style-name="P6">incremental parsing</text:p>
        </text:list-item>
        <text:list-item>
          <text:p text:style-name="P6">PROC/FN symbol table</text:p>
        </text:list-item>
      </text:list>
      <text:p text:style-name="P1">Your parser is no longer a “best effort” text highlighter — it’s now a deterministic lexical analyser with proper longest‑match semantics.</text:p>
      <text:p text:style-name="P1">If you want, I can help you extend the trie to also detect:</text:p>
      <text:list text:style-name="L4">
        <text:list-item>
          <text:p text:style-name="P7">pseudo‑variables</text:p>
        </text:list-item>
        <text:list-item>
          <text:p text:style-name="P7">assembler opcodes</text:p>
        </text:list-item>
        <text:list-item>
          <text:p text:style-name="P7">numeric literals</text:p>
        </text:list-item>
        <text:list-item>
          <text:p text:style-name="P7">operators</text:p>
        </text:list-item>
        <text:list-item>
          <text:p text:style-name="P7"><text:soft-page-break/>multi‑character tokens (<text:span text:style-name="Source_20_Text">&gt;=</text:span>, <text:span text:style-name="Source_20_Text">&lt;=</text:span>, <text:span text:style-name="Source_20_Text">&lt;&gt;</text:span>, <text:span text:style-name="Source_20_Text">==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aramond" svg:font-family="Garamond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lgun Gothic" svg:font-family="'Malgun Gothic'" style:font-family-generic="swiss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oto Serif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oto Serif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Noto Sans SC" style:font-family-asian="'Noto Sans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C Rowland</meta:initial-creator>
    <meta:creation-date>2026-05-10T14:27:05.382000600</meta:creation-date>
    <dc:date>2026-05-10T14:28:45.783627300</dc:date>
    <dc:creator>A C Rowland</dc:creator>
    <meta:editing-duration>PT1M41S</meta:editing-duration>
    <meta:editing-cycles>1</meta:editing-cycles>
    <meta:document-statistic meta:table-count="0" meta:image-count="0" meta:object-count="0" meta:page-count="4" meta:paragraph-count="124" meta:word-count="488" meta:character-count="3567" meta:non-whitespace-character-count="2685"/>
    <meta:generator>LibreOffice/26.2.1.2$Windows_X86_64 LibreOffice_project/620$Build-2</meta:generator>
  </office:meta>
</office:document-meta>
</file>