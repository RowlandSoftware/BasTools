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.441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calculation-settings table:use-regular-expressions="false" table:null-year="1950"/>
      <table:table table:name="temp.dou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APPEND <text:s text:c="2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];[$Sheet2.$A$1:.$A$5];[$Sheet2.B$1:.B$5])" office:value-type="string" office:string-value="0xA6" calcext:value-type="string">
            <text:p>0xA6</text:p>
          </table:table-cell>
          <table:table-cell table:formula="of:=LOOKUP([.$D1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BEATS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E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];[$Sheet2.$A$1:.$A$5];[$Sheet2.B$1:.B$5])" office:value-type="string" office:string-value="0xA6" calcext:value-type="string">
            <text:p>0xA6</text:p>
          </table:table-cell>
          <table:table-cell table:formula="of:=LOOKUP([.$D2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BEAT <text:s text:c="4"/></text:p>
          </table:table-cell>
          <table:table-cell office:value-type="string" calcext:value-type="string">
            <text:p>&amp;C6</text:p>
          </table:table-cell>
          <table:table-cell office:value-type="string" calcext:value-type="string">
            <text:p>&amp;8F</text:p>
          </table:table-cell>
          <table:table-cell office:value-type="string" calcext:value-type="string">
            <text:p>&amp;83 </text:p>
          </table:table-cell>
          <table:table-cell office:value-type="string" calcext:value-type="string">
            <text:p><text:s/>10000011 <text:s text:c="2"/></text:p>
          </table:table-cell>
          <table:table-cell office:value-type="string" calcext:value-type="string">
            <text:p>Acorn token</text:p>
          </table:table-cell>
          <table:table-cell table:formula="of:=LOOKUP([.$D3];[$Sheet2.$A$1:.$A$5];[$Sheet2.B$1:.B$5])" office:value-type="string" office:string-value="0x85" calcext:value-type="string">
            <text:p>0x85</text:p>
          </table:table-cell>
          <table:table-cell table:formula="of:=LOOKUP([.$D3];[$Sheet2.$A$1:.$A$5];[$Sheet2.D$1:.D$5])" office:value-type="string" office:string-value="2----S-C" calcext:value-type="string">
            <text:p>2----S-C</text:p>
          </table:table-cell>
        </table:table-row>
        <table:table-row table:style-name="ro1">
          <table:table-cell office:value-type="string" calcext:value-type="string">
            <text:p>CASE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4];[$Sheet2.$A$1:.$A$5];[$Sheet2.B$1:.B$5])" office:value-type="string" office:string-value="0xA6" calcext:value-type="string">
            <text:p>0xA6</text:p>
          </table:table-cell>
          <table:table-cell table:formula="of:=LOOKUP([.$D4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CIRCL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8F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5];[$Sheet2.$A$1:.$A$5];[$Sheet2.B$1:.B$5])" office:value-type="string" office:string-value="0xA6" calcext:value-type="string">
            <text:p>0xA6</text:p>
          </table:table-cell>
          <table:table-cell table:formula="of:=LOOKUP([.$D5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CRUNCH <text:s text:c="2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0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6];[$Sheet2.$A$1:.$A$5];[$Sheet2.B$1:.B$5])" office:value-type="string" office:string-value="0xA6" calcext:value-type="string">
            <text:p>0xA6</text:p>
          </table:table-cell>
          <table:table-cell table:formula="of:=LOOKUP([.$D6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ENDCASE <text:s/></text:p>
          </table:table-cell>
          <table:table-cell office:value-type="string" calcext:value-type="string">
            <text:p>&amp;CB <text:s text:c="3"/></text:p>
          </table:table-cell>
          <table:table-cell/>
          <table:table-cell office:value-type="string" calcext:value-type="string">
            <text:p>&amp;03 </text:p>
          </table:table-cell>
          <table:table-cell office:value-type="string" calcext:value-type="string">
            <text:p><text:s/>00000011</text:p>
          </table:table-cell>
          <table:table-cell/>
          <table:table-cell table:formula="of:=LOOKUP([.$D7];[$Sheet2.$A$1:.$A$5];[$Sheet2.B$1:.B$5])" office:value-type="string" office:string-value="0x03" calcext:value-type="string">
            <text:p>0x03</text:p>
          </table:table-cell>
          <table:table-cell table:formula="of:=LOOKUP([.$D7];[$Sheet2.$A$1:.$A$5];[$Sheet2.D$1:.D$5])" office:value-type="string" office:string-value="-------MC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NDIF <text:s text:c="3"/></text:p>
          </table:table-cell>
          <table:table-cell office:value-type="string" calcext:value-type="string">
            <text:p>&amp;CD <text:s text:c="3"/></text:p>
          </table:table-cell>
          <table:table-cell/>
          <table:table-cell office:value-type="string" calcext:value-type="string">
            <text:p>&amp;03 </text:p>
          </table:table-cell>
          <table:table-cell office:value-type="string" calcext:value-type="string">
            <text:p><text:s/>00000011</text:p>
          </table:table-cell>
          <table:table-cell/>
          <table:table-cell table:formula="of:=LOOKUP([.$D8];[$Sheet2.$A$1:.$A$5];[$Sheet2.B$1:.B$5])" office:value-type="string" office:string-value="0x03" calcext:value-type="string">
            <text:p>0x03</text:p>
          </table:table-cell>
          <table:table-cell table:formula="of:=LOOKUP([.$D8];[$Sheet2.$A$1:.$A$5];[$Sheet2.D$1:.D$5])" office:value-type="string" office:string-value="-------MC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NDWHILE </text:p>
          </table:table-cell>
          <table:table-cell office:value-type="string" calcext:value-type="string">
            <text:p>&amp;CE <text:s text:c="3"/></text:p>
          </table:table-cell>
          <table:table-cell/>
          <table:table-cell office:value-type="string" calcext:value-type="string">
            <text:p>&amp;03 </text:p>
          </table:table-cell>
          <table:table-cell office:value-type="string" calcext:value-type="string">
            <text:p><text:s/>00000011</text:p>
          </table:table-cell>
          <table:table-cell/>
          <table:table-cell table:formula="of:=LOOKUP([.$D9];[$Sheet2.$A$1:.$A$5];[$Sheet2.B$1:.B$5])" office:value-type="string" office:string-value="0x03" calcext:value-type="string">
            <text:p>0x03</text:p>
          </table:table-cell>
          <table:table-cell table:formula="of:=LOOKUP([.$D9];[$Sheet2.$A$1:.$A$5];[$Sheet2.D$1:.D$5])" office:value-type="string" office:string-value="-------MC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LLIPSE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D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0];[$Sheet2.$A$1:.$A$5];[$Sheet2.B$1:.B$5])" office:value-type="string" office:string-value="0xA6" calcext:value-type="string">
            <text:p>0xA6</text:p>
          </table:table-cell>
          <table:table-cell table:formula="of:=LOOKUP([.$D10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EXI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6</text:p>
          </table:table-cell>
          <table:table-cell office:value-type="string" calcext:value-type="string">
            <text:p>&amp;83 </text:p>
          </table:table-cell>
          <table:table-cell office:value-type="string" calcext:value-type="string">
            <text:p><text:s/>10000011 <text:s text:c="2"/></text:p>
          </table:table-cell>
          <table:table-cell office:value-type="string" calcext:value-type="string">
            <text:p>Acorn token</text:p>
          </table:table-cell>
          <table:table-cell table:formula="of:=LOOKUP([.$D11];[$Sheet2.$A$1:.$A$5];[$Sheet2.B$1:.B$5])" office:value-type="string" office:string-value="0x85" calcext:value-type="string">
            <text:p>0x85</text:p>
          </table:table-cell>
          <table:table-cell table:formula="of:=LOOKUP([.$D11];[$Sheet2.$A$1:.$A$5];[$Sheet2.D$1:.D$5])" office:value-type="string" office:string-value="2----S-C" calcext:value-type="string">
            <text:p>2----S-C</text:p>
          </table:table-cell>
        </table:table-row>
        <table:table-row table:style-name="ro1">
          <table:table-cell office:value-type="string" calcext:value-type="string">
            <text:p>FILL <text:s text:c="5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0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2];[$Sheet2.$A$1:.$A$5];[$Sheet2.B$1:.B$5])" office:value-type="string" office:string-value="0xA6" calcext:value-type="string">
            <text:p>0xA6</text:p>
          </table:table-cell>
          <table:table-cell table:formula="of:=LOOKUP([.$D12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INSTALL <text:s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F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3];[$Sheet2.$A$1:.$A$5];[$Sheet2.B$1:.B$5])" office:value-type="string" office:string-value="0xA6" calcext:value-type="string">
            <text:p>0xA6</text:p>
          </table:table-cell>
          <table:table-cell table:formula="of:=LOOKUP([.$D13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INSTALL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A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4];[$Sheet2.$A$1:.$A$5];[$Sheet2.B$1:.B$5])" office:value-type="string" office:string-value="0xA6" calcext:value-type="string">
            <text:p>0xA6</text:p>
          </table:table-cell>
          <table:table-cell table:formula="of:=LOOKUP([.$D14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LINE <text:s text:c="4"/></text:p>
          </table:table-cell>
          <table:table-cell office:value-type="string" calcext:value-type="string">
            <text:p>&amp;86 <text:s text:c="3"/></text:p>
          </table:table-cell>
          <table:table-cell/>
          <table:table-cell office:value-type="string" calcext:value-type="string">
            <text:p>&amp;02 </text:p>
          </table:table-cell>
          <table:table-cell office:value-type="string" calcext:value-type="string">
            <text:p><text:s/>00000010</text:p>
          </table:table-cell>
          <table:table-cell/>
          <table:table-cell table:formula="of:=LOOKUP([.$D15];[$Sheet2.$A$1:.$A$5];[$Sheet2.B$1:.B$5])" office:value-type="string" office:string-value="0x04" calcext:value-type="string">
            <text:p>0x04</text:p>
          </table:table-cell>
          <table:table-cell table:formula="of:=LOOKUP([.$D15];[$Sheet2.$A$1:.$A$5];[$Sheet2.D$1:.D$5])" office:value-type="string" office:string-value="------S--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LIBRARY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B</text:p>
          </table:table-cell>
          <table:table-cell office:value-type="string" calcext:value-type="string">
            <text:p>&amp;06 </text:p>
          </table:table-cell>
          <table:table-cell office:value-type="string" calcext:value-type="string">
            <text:p><text:s/>0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6];[$Sheet2.$A$1:.$A$5];[$Sheet2.B$1:.B$5])" office:value-type="string" office:string-value="0x06" calcext:value-type="string">
            <text:p>0x06</text:p>
          </table:table-cell>
          <table:table-cell table:formula="of:=LOOKUP([.$D16];[$Sheet2.$A$1:.$A$5];[$Sheet2.D$1:.D$5])" office:value-type="string" office:string-value="------SM-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LVAR <text:s text:c="4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6</text:p>
          </table:table-cell>
          <table:table-cell office:value-type="string" calcext:value-type="string">
            <text:p>&amp;83 </text:p>
          </table:table-cell>
          <table:table-cell office:value-type="string" calcext:value-type="string">
            <text:p><text:s/>10000011 <text:s text:c="2"/></text:p>
          </table:table-cell>
          <table:table-cell office:value-type="string" calcext:value-type="string">
            <text:p>Acorn token</text:p>
          </table:table-cell>
          <table:table-cell table:formula="of:=LOOKUP([.$D17];[$Sheet2.$A$1:.$A$5];[$Sheet2.B$1:.B$5])" office:value-type="string" office:string-value="0x85" calcext:value-type="string">
            <text:p>0x85</text:p>
          </table:table-cell>
          <table:table-cell table:formula="of:=LOOKUP([.$D17];[$Sheet2.$A$1:.$A$5];[$Sheet2.D$1:.D$5])" office:value-type="string" office:string-value="2----S-C" calcext:value-type="string">
            <text:p>2----S-C</text:p>
          </table:table-cell>
        </table:table-row>
        <table:table-row table:style-name="ro1">
          <table:table-cell office:value-type="string" calcext:value-type="string">
            <text:p>MOUS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7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18];[$Sheet2.$A$1:.$A$5];[$Sheet2.B$1:.B$5])" office:value-type="string" office:string-value="0xA6" calcext:value-type="string">
            <text:p>0xA6</text:p>
          </table:table-cell>
          <table:table-cell table:formula="of:=LOOKUP([.$D18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OFF <text:s text:c="5"/></text:p>
          </table:table-cell>
          <table:table-cell office:value-type="string" calcext:value-type="string">
            <text:p>&amp;87 <text:s text:c="3"/></text:p>
          </table:table-cell>
          <table:table-cell/>
          <table:table-cell office:value-type="string" calcext:value-type="string">
            <text:p>&amp;02 </text:p>
          </table:table-cell>
          <table:table-cell office:value-type="string" calcext:value-type="string">
            <text:p><text:s/>00000010</text:p>
          </table:table-cell>
          <table:table-cell office:value-type="string" calcext:value-type="string">
            <text:p>flags=&amp;03 in later tokens</text:p>
          </table:table-cell>
          <table:table-cell table:formula="of:=LOOKUP([.$D19];[$Sheet2.$A$1:.$A$5];[$Sheet2.B$1:.B$5])" office:value-type="string" office:string-value="0x04" calcext:value-type="string">
            <text:p>0x04</text:p>
          </table:table-cell>
          <table:table-cell table:formula="of:=LOOKUP([.$D19];[$Sheet2.$A$1:.$A$5];[$Sheet2.D$1:.D$5])" office:value-type="string" office:string-value="------S--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OF <text:s text:c="6"/></text:p>
          </table:table-cell>
          <table:table-cell office:value-type="string" calcext:value-type="string">
            <text:p>&amp;CA <text:s text:c="3"/></text:p>
          </table:table-cell>
          <table:table-cell/>
          <table:table-cell office:value-type="string" calcext:value-type="string">
            <text:p>&amp;02 </text:p>
          </table:table-cell>
          <table:table-cell office:value-type="string" calcext:value-type="string">
            <text:p><text:s/>00000010</text:p>
          </table:table-cell>
          <table:table-cell/>
          <table:table-cell table:formula="of:=LOOKUP([.$D20];[$Sheet2.$A$1:.$A$5];[$Sheet2.B$1:.B$5])" office:value-type="string" office:string-value="0x04" calcext:value-type="string">
            <text:p>0x04</text:p>
          </table:table-cell>
          <table:table-cell table:formula="of:=LOOKUP([.$D20];[$Sheet2.$A$1:.$A$5];[$Sheet2.D$1:.D$5])" office:value-type="string" office:string-value="------S--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ORIGIN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1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1];[$Sheet2.$A$1:.$A$5];[$Sheet2.B$1:.B$5])" office:value-type="string" office:string-value="0xA6" calcext:value-type="string">
            <text:p>0xA6</text:p>
          </table:table-cell>
          <table:table-cell table:formula="of:=LOOKUP([.$D21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&amp;7F <text:s text:c="3"/></text:p>
          </table:table-cell>
          <table:table-cell/>
          <table:table-cell office:value-type="string" calcext:value-type="string">
            <text:p>&amp;00 </text:p>
          </table:table-cell>
          <table:table-cell office:value-type="string" calcext:value-type="string">
            <text:p><text:s/>00000000 <text:s text:c="2"/></text:p>
          </table:table-cell>
          <table:table-cell office:value-type="string" calcext:value-type="string">
            <text:p>Acorn to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----</text:p>
          </table:table-cell>
        </table:table-row>
        <table:table-row table:style-name="ro1">
          <table:table-cell office:value-type="string" calcext:value-type="string">
            <text:p>OVERLAY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3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3];[$Sheet2.$A$1:.$A$5];[$Sheet2.B$1:.B$5])" office:value-type="string" office:string-value="0xA6" calcext:value-type="string">
            <text:p>0xA6</text:p>
          </table:table-cell>
          <table:table-cell table:formula="of:=LOOKUP([.$D23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POIN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2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4];[$Sheet2.$A$1:.$A$5];[$Sheet2.B$1:.B$5])" office:value-type="string" office:string-value="0xA6" calcext:value-type="string">
            <text:p>0xA6</text:p>
          </table:table-cell>
          <table:table-cell table:formula="of:=LOOKUP([.$D24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PRIVATE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5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5];[$Sheet2.$A$1:.$A$5];[$Sheet2.B$1:.B$5])" office:value-type="string" office:string-value="0xA6" calcext:value-type="string">
            <text:p>0xA6</text:p>
          </table:table-cell>
          <table:table-cell table:formula="of:=LOOKUP([.$D25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3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6];[$Sheet2.$A$1:.$A$5];[$Sheet2.B$1:.B$5])" office:value-type="string" office:string-value="0xA6" calcext:value-type="string">
            <text:p>0xA6</text:p>
          </table:table-cell>
          <table:table-cell table:formula="of:=LOOKUP([.$D26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REPORT$ </text:p>
          </table:table-cell>
          <table:table-cell table:style-name="ce1" office:value-type="string" calcext:value-type="string">
            <text:p>&amp;F6</text:p>
          </table:table-cell>
          <table:table-cell office:value-type="string" calcext:value-type="string">
            <text:p>&amp;24</text:p>
          </table:table-cell>
          <table:table-cell office:value-type="string" calcext:value-type="string">
            <text:p>&amp;01</text:p>
          </table:table-cell>
          <table:table-cell office:value-type="string" calcext:value-type="string">
            <text:p><text:s/>00000001</text:p>
          </table:table-cell>
          <table:table-cell/>
          <table:table-cell office:value-type="string" calcext:value-type="string">
            <text:p>&amp;01</text:p>
          </table:table-cell>
          <table:table-cell office:value-type="string" calcext:value-type="string">
            <text:p>-------C</text:p>
          </table:table-cell>
        </table:table-row>
        <table:table-row table:style-name="ro1">
          <table:table-cell office:value-type="string" calcext:value-type="string">
            <text:p>STEREO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2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28];[$Sheet2.$A$1:.$A$5];[$Sheet2.B$1:.B$5])" office:value-type="string" office:string-value="0xA6" calcext:value-type="string">
            <text:p>0xA6</text:p>
          </table:table-cell>
          <table:table-cell table:formula="of:=LOOKUP([.$D28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SOUND <text:s text:c="3"/></text:p>
          </table:table-cell>
          <table:table-cell office:value-type="string" calcext:value-type="string">
            <text:p>&amp;D4 <text:s text:c="3"/></text:p>
          </table:table-cell>
          <table:table-cell/>
          <table:table-cell office:value-type="string" calcext:value-type="string">
            <text:p>&amp;06 </text:p>
          </table:table-cell>
          <table:table-cell office:value-type="string" calcext:value-type="string">
            <text:p><text:s/>00000110</text:p>
          </table:table-cell>
          <table:table-cell/>
          <table:table-cell table:formula="of:=LOOKUP([.$D29];[$Sheet2.$A$1:.$A$5];[$Sheet2.B$1:.B$5])" office:value-type="string" office:string-value="0x06" calcext:value-type="string">
            <text:p>0x06</text:p>
          </table:table-cell>
          <table:table-cell table:formula="of:=LOOKUP([.$D29];[$Sheet2.$A$1:.$A$5];[$Sheet2.D$1:.D$5])" office:value-type="string" office:string-value="------SM-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SUM <text:s text:c="5"/></text:p>
          </table:table-cell>
          <table:table-cell office:value-type="string" calcext:value-type="string">
            <text:p>&amp;C6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&amp;83 </text:p>
          </table:table-cell>
          <table:table-cell office:value-type="string" calcext:value-type="string">
            <text:p><text:s/>10000011 <text:s text:c="2"/></text:p>
          </table:table-cell>
          <table:table-cell office:value-type="string" calcext:value-type="string">
            <text:p>Acorn token</text:p>
          </table:table-cell>
          <table:table-cell table:formula="of:=LOOKUP([.$D30];[$Sheet2.$A$1:.$A$5];[$Sheet2.B$1:.B$5])" office:value-type="string" office:string-value="0x85" calcext:value-type="string">
            <text:p>0x85</text:p>
          </table:table-cell>
          <table:table-cell table:formula="of:=LOOKUP([.$D30];[$Sheet2.$A$1:.$A$5];[$Sheet2.D$1:.D$5])" office:value-type="string" office:string-value="2----S-C" calcext:value-type="string">
            <text:p>2----S-C</text:p>
          </table:table-cell>
        </table:table-row>
        <table:table-row table:style-name="ro1">
          <table:table-cell office:value-type="string" calcext:value-type="string">
            <text:p>SWAP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4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1];[$Sheet2.$A$1:.$A$5];[$Sheet2.B$1:.B$5])" office:value-type="string" office:string-value="0xA6" calcext:value-type="string">
            <text:p>0xA6</text:p>
          </table:table-cell>
          <table:table-cell table:formula="of:=LOOKUP([.$D31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SYS <text:s text:c="5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9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2];[$Sheet2.$A$1:.$A$5];[$Sheet2.B$1:.B$5])" office:value-type="string" office:string-value="0xA6" calcext:value-type="string">
            <text:p>0xA6</text:p>
          </table:table-cell>
          <table:table-cell table:formula="of:=LOOKUP([.$D32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MPO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F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0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3];[$Sheet2.$A$1:.$A$5];[$Sheet2.B$1:.B$5])" office:value-type="string" office:string-value="0xA6" calcext:value-type="string">
            <text:p>0xA6</text:p>
          </table:table-cell>
          <table:table-cell table:formula="of:=LOOKUP([.$D33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XTLOAD 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B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0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4];[$Sheet2.$A$1:.$A$5];[$Sheet2.B$1:.B$5])" office:value-type="string" office:string-value="0xA6" calcext:value-type="string">
            <text:p>0xA6</text:p>
          </table:table-cell>
          <table:table-cell table:formula="of:=LOOKUP([.$D34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XTSAVE 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C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5];[$Sheet2.$A$1:.$A$5];[$Sheet2.B$1:.B$5])" office:value-type="string" office:string-value="0xA6" calcext:value-type="string">
            <text:p>0xA6</text:p>
          </table:table-cell>
          <table:table-cell table:formula="of:=LOOKUP([.$D35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IN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C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6];[$Sheet2.$A$1:.$A$5];[$Sheet2.B$1:.B$5])" office:value-type="string" office:string-value="0xA6" calcext:value-type="string">
            <text:p>0xA6</text:p>
          </table:table-cell>
          <table:table-cell table:formula="of:=LOOKUP([.$D36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VOICES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0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7];[$Sheet2.$A$1:.$A$5];[$Sheet2.B$1:.B$5])" office:value-type="string" office:string-value="0xA6" calcext:value-type="string">
            <text:p>0xA6</text:p>
          </table:table-cell>
          <table:table-cell table:formula="of:=LOOKUP([.$D37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VOIC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1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38];[$Sheet2.$A$1:.$A$5];[$Sheet2.B$1:.B$5])" office:value-type="string" office:string-value="0xA6" calcext:value-type="string">
            <text:p>0xA6</text:p>
          </table:table-cell>
          <table:table-cell table:formula="of:=LOOKUP([.$D38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WHEN <text:s text:c="4"/></text:p>
          </table:table-cell>
          <table:table-cell office:value-type="string" calcext:value-type="string">
            <text:p>&amp;C9 <text:s text:c="3"/></text:p>
          </table:table-cell>
          <table:table-cell/>
          <table:table-cell office:value-type="string" calcext:value-type="string">
            <text:p>&amp;06 </text:p>
          </table:table-cell>
          <table:table-cell office:value-type="string" calcext:value-type="string">
            <text:p><text:s/>00000110</text:p>
          </table:table-cell>
          <table:table-cell/>
          <table:table-cell table:formula="of:=LOOKUP([.$D39];[$Sheet2.$A$1:.$A$5];[$Sheet2.B$1:.B$5])" office:value-type="string" office:string-value="0x06" calcext:value-type="string">
            <text:p>0x06</text:p>
          </table:table-cell>
          <table:table-cell table:formula="of:=LOOKUP([.$D39];[$Sheet2.$A$1:.$A$5];[$Sheet2.D$1:.D$5])" office:value-type="string" office:string-value="------SM-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WHIL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5</text:p>
          </table:table-cell>
          <table:table-cell office:value-type="string" calcext:value-type="string">
            <text:p>&amp;86 </text:p>
          </table:table-cell>
          <table:table-cell office:value-type="string" calcext:value-type="string">
            <text:p><text:s/>10000110 <text:s text:c="2"/></text:p>
          </table:table-cell>
          <table:table-cell office:value-type="string" calcext:value-type="string">
            <text:p>Acorn token</text:p>
          </table:table-cell>
          <table:table-cell table:formula="of:=LOOKUP([.$D40];[$Sheet2.$A$1:.$A$5];[$Sheet2.B$1:.B$5])" office:value-type="string" office:string-value="0xA6" calcext:value-type="string">
            <text:p>0xA6</text:p>
          </table:table-cell>
          <table:table-cell table:formula="of:=LOOKUP([.$D40];[$Sheet2.$A$1:.$A$5];[$Sheet2.D$1:.D$5])" office:value-type="string" office:string-value="2P-RL-S-" calcext:value-type="string">
            <text:p>2P-RL-S-</text:p>
          </table:table-cell>
        </table:table-row>
        <table:table-row table:style-name="ro1">
          <table:table-cell office:value-type="string" calcext:value-type="string">
            <text:p>WAI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6</text:p>
          </table:table-cell>
          <table:table-cell office:value-type="string" calcext:value-type="string">
            <text:p>&amp;83 </text:p>
          </table:table-cell>
          <table:table-cell office:value-type="string" calcext:value-type="string">
            <text:p><text:s/>10000011 <text:s text:c="2"/></text:p>
          </table:table-cell>
          <table:table-cell office:value-type="string" calcext:value-type="string">
            <text:p>Acorn token</text:p>
          </table:table-cell>
          <table:table-cell table:formula="of:=LOOKUP([.$D41];[$Sheet2.$A$1:.$A$5];[$Sheet2.B$1:.B$5])" office:value-type="string" office:string-value="0x85" calcext:value-type="string">
            <text:p>0x85</text:p>
          </table:table-cell>
          <table:table-cell table:formula="of:=LOOKUP([.$D41];[$Sheet2.$A$1:.$A$5];[$Sheet2.D$1:.D$5])" office:value-type="string" office:string-value="2----S-C" calcext:value-type="string">
            <text:p>2----S-C</text:p>
          </table:table-cell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&amp;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(00000100)</text:p>
          </table:table-cell>
          <table:table-cell office:value-type="string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&amp;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(00000011)</text:p>
          </table:table-cell>
          <table:table-cell office:value-type="string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&amp;0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(00000110)</text:p>
          </table:table-cell>
          <table:table-cell office:value-type="string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&amp;8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(10000101)</text:p>
          </table:table-cell>
          <table:table-cell office:value-type="string" calcext:value-type="string">
            <text:p>2----S-C</text:p>
          </table:table-cell>
        </table:table-row>
        <table:table-row table:style-name="ro1">
          <table:table-cell office:value-type="string" calcext:value-type="string">
            <text:p>&amp;86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(10100110)</text:p>
          </table:table-cell>
          <table:table-cell office:value-type="string" calcext:value-type="string">
            <text:p>2P-RL-S-</text:p>
          </table:table-cell>
        </table:table-row>
      </table:table>
      <table:table table:name="Sheet3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APPEND <text:s text:c="2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BEATS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E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BEAT <text:s text:c="4"/></text:p>
          </table:table-cell>
          <table:table-cell office:value-type="string" calcext:value-type="string">
            <text:p>&amp;C6</text:p>
          </table:table-cell>
          <table:table-cell office:value-type="string" calcext:value-type="string">
            <text:p>&amp;8F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----S-C</text:p>
          </table:table-cell>
        </table:table-row>
        <table:table-row table:style-name="ro1">
          <table:table-cell office:value-type="string" calcext:value-type="string">
            <text:p>CASE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CIRCL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8F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CRUNCH <text:s text:c="2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ENDCASE <text:s/></text:p>
          </table:table-cell>
          <table:table-cell office:value-type="string" calcext:value-type="string">
            <text:p>&amp;CB <text:s text:c="3"/>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NDIF <text:s text:c="3"/></text:p>
          </table:table-cell>
          <table:table-cell office:value-type="string" calcext:value-type="string">
            <text:p>&amp;CD <text:s text:c="3"/>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NDWHILE </text:p>
          </table:table-cell>
          <table:table-cell office:value-type="string" calcext:value-type="string">
            <text:p>&amp;CE <text:s text:c="3"/>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-------MC</text:p>
          </table:table-cell>
        </table:table-row>
        <table:table-row table:style-name="ro1">
          <table:table-cell office:value-type="string" calcext:value-type="string">
            <text:p>ELLIPSE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D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EXI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6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----S-C</text:p>
          </table:table-cell>
        </table:table-row>
        <table:table-row table:style-name="ro1">
          <table:table-cell office:value-type="string" calcext:value-type="string">
            <text:p>FILL <text:s text:c="5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INSTALL <text:s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F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INSTALL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A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LINE <text:s text:c="4"/></text:p>
          </table:table-cell>
          <table:table-cell office:value-type="string" calcext:value-type="string">
            <text:p>&amp;86 <text:s text:c="3"/>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LIBRARY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B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LVAR <text:s text:c="4"/>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6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----S-C</text:p>
          </table:table-cell>
        </table:table-row>
        <table:table-row table:style-name="ro1">
          <table:table-cell office:value-type="string" calcext:value-type="string">
            <text:p>MOUS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7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OFF <text:s text:c="5"/></text:p>
          </table:table-cell>
          <table:table-cell office:value-type="string" calcext:value-type="string">
            <text:p>&amp;87 <text:s text:c="3"/>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OF <text:s text:c="6"/></text:p>
          </table:table-cell>
          <table:table-cell office:value-type="string" calcext:value-type="string">
            <text:p>&amp;CA <text:s text:c="3"/>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------S--</text:p>
          </table:table-cell>
        </table:table-row>
        <table:table-row table:style-name="ro1">
          <table:table-cell office:value-type="string" calcext:value-type="string">
            <text:p>ORIGIN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1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&amp;7F <text:s text:c="3"/></text:p>
          </table:table-cell>
          <table:table-cell table:number-columns-repeated="2"/>
          <table:table-cell office:value-type="string" calcext:value-type="string">
            <text:p>--------</text:p>
          </table:table-cell>
        </table:table-row>
        <table:table-row table:style-name="ro1">
          <table:table-cell office:value-type="string" calcext:value-type="string">
            <text:p>OVERLAY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3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POIN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2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PRIVATE <text:s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5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3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REPORT$ </text:p>
          </table:table-cell>
          <table:table-cell office:value-type="string" calcext:value-type="string">
            <text:p>&amp;F6</text:p>
          </table:table-cell>
          <table:table-cell office:value-type="string" calcext:value-type="string">
            <text:p>&amp;24</text:p>
          </table:table-cell>
          <table:table-cell office:value-type="string" calcext:value-type="string">
            <text:p>&amp;01</text:p>
          </table:table-cell>
          <table:table-cell office:value-type="string" calcext:value-type="string">
            <text:p>-------C</text:p>
          </table:table-cell>
        </table:table-row>
        <table:table-row table:style-name="ro1">
          <table:table-cell office:value-type="string" calcext:value-type="string">
            <text:p>STEREO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2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SOUND <text:s text:c="3"/></text:p>
          </table:table-cell>
          <table:table-cell office:value-type="string" calcext:value-type="string">
            <text:p>&amp;D4 <text:s text:c="3"/>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SUM <text:s text:c="5"/></text:p>
          </table:table-cell>
          <table:table-cell office:value-type="string" calcext:value-type="string">
            <text:p>&amp;C6</text:p>
          </table:table-cell>
          <table:table-cell office:value-type="string" calcext:value-type="string">
            <text:p>&amp;8E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----S-C</text:p>
          </table:table-cell>
        </table:table-row>
        <table:table-row table:style-name="ro1">
          <table:table-cell office:value-type="string" calcext:value-type="string">
            <text:p>SWAP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4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SYS <text:s text:c="5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9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MPO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F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XTLOAD 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B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EXTSAVE </text:p>
          </table:table-cell>
          <table:table-cell office:value-type="string" calcext:value-type="string">
            <text:p>&amp;C7</text:p>
          </table:table-cell>
          <table:table-cell office:value-type="string" calcext:value-type="string">
            <text:p>&amp;9C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TIN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C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VOICES <text:s text:c="2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VOIC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A1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WHEN <text:s text:c="4"/></text:p>
          </table:table-cell>
          <table:table-cell office:value-type="string" calcext:value-type="string">
            <text:p>&amp;C9 <text:s text:c="3"/>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------SM-</text:p>
          </table:table-cell>
        </table:table-row>
        <table:table-row table:style-name="ro1">
          <table:table-cell office:value-type="string" calcext:value-type="string">
            <text:p>WHILE <text:s text:c="3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5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P-RL-S-</text:p>
          </table:table-cell>
        </table:table-row>
        <table:table-row table:style-name="ro1">
          <table:table-cell office:value-type="string" calcext:value-type="string">
            <text:p>WAIT <text:s text:c="4"/></text:p>
          </table:table-cell>
          <table:table-cell office:value-type="string" calcext:value-type="string">
            <text:p>&amp;C8</text:p>
          </table:table-cell>
          <table:table-cell office:value-type="string" calcext:value-type="string">
            <text:p>&amp;96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----S-C</text:p>
          </table:table-cell>
        </table:table-row>
      </table:table>
      <table:named-expressions/>
      <table:database-ranges>
        <table:database-range table:name="lkup" table:target-range-address="Sheet2.A3:Sheet2.D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7-21T17:27:41.926846400</dc:date>
    <dc:creator>A C Rowland</dc:creator>
    <meta:editing-duration>PT2M55S</meta:editing-duration>
    <meta:editing-cycles>4</meta:editing-cycles>
    <meta:generator>LibreOffice/26.2.4.2$Windows_X86_64 LibreOffice_project/0229ac93fcf0d7cbc6376066c6f35021cef002dc</meta:generator>
    <meta:document-statistic meta:table-count="3" meta:cell-count="526" meta:object-count="0"/>
  </office:meta>
</office:document-meta>
</file>