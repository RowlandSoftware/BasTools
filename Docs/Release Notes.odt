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1400000127489C511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1.55cm" style:rel-column-width="44524*"/>
    </style:style>
    <style:style style:name="Table1.B" style:family="table-column">
      <style:table-column-properties style:column-width="5.45cm" style:rel-column-width="21011*"/>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Heading_20_1">
      <style:text-properties officeooo:rsid="00681e4f"/>
    </style:style>
    <style:style style:name="P2" style:family="paragraph" style:parent-style-name="Text_20_body">
      <style:text-properties officeooo:rsid="00840bcf" officeooo:paragraph-rsid="00840bcf"/>
    </style:style>
    <style:style style:name="P3" style:family="paragraph" style:parent-style-name="Text_20_body">
      <style:text-properties officeooo:rsid="00894cbd" officeooo:paragraph-rsid="00894cbd"/>
    </style:style>
    <style:style style:name="P4" style:family="paragraph" style:parent-style-name="Hanging_20_indent">
      <style:paragraph-properties fo:margin-top="0cm" fo:margin-bottom="0.199cm" style:contextual-spacing="false" fo:line-height="120%"/>
      <style:text-properties officeooo:rsid="00619942" officeooo:paragraph-rsid="0069c419"/>
    </style:style>
    <style:style style:name="P5" style:family="paragraph" style:parent-style-name="Text_20_body">
      <style:text-properties officeooo:rsid="00894cbd" officeooo:paragraph-rsid="008ff03f"/>
    </style:style>
    <style:style style:name="P6" style:family="paragraph" style:parent-style-name="Text_20_body">
      <style:text-properties officeooo:rsid="006bc1f3" officeooo:paragraph-rsid="006bc1f3"/>
    </style:style>
    <style:style style:name="P7" style:family="paragraph" style:parent-style-name="Table_20_Heading">
      <style:text-properties officeooo:rsid="006bc1f3" officeooo:paragraph-rsid="006bc1f3"/>
    </style:style>
    <style:style style:name="P8" style:family="paragraph" style:parent-style-name="Table_20_Contents">
      <style:text-properties officeooo:rsid="006bc1f3" officeooo:paragraph-rsid="006bc1f3"/>
    </style:style>
    <style:style style:name="P9" style:family="paragraph" style:parent-style-name="Table_20_Contents">
      <style:text-properties officeooo:rsid="006d832c" officeooo:paragraph-rsid="006d832c"/>
    </style:style>
    <style:style style:name="P10" style:family="paragraph" style:parent-style-name="Table_20_Contents">
      <style:text-properties officeooo:rsid="007b4c90" officeooo:paragraph-rsid="007b4c90"/>
    </style:style>
    <style:style style:name="P11" style:family="paragraph" style:parent-style-name="Table_20_Contents">
      <style:paragraph-properties fo:margin-top="0.4cm" fo:margin-bottom="0.101cm" style:contextual-spacing="false"/>
      <style:text-properties officeooo:rsid="006d832c" officeooo:paragraph-rsid="006d832c"/>
    </style:style>
    <style:style style:name="P12" style:family="paragraph" style:parent-style-name="Table_20_Contents">
      <style:text-properties officeooo:rsid="0099c9d9" officeooo:paragraph-rsid="009ad212"/>
    </style:style>
    <style:style style:name="P13" style:family="paragraph" style:parent-style-name="Table_20_Contents">
      <style:text-properties officeooo:rsid="006dd61d" officeooo:paragraph-rsid="006dd61d"/>
    </style:style>
    <style:style style:name="P14" style:family="paragraph" style:parent-style-name="Table_20_Contents">
      <style:text-properties officeooo:rsid="006dd61d" officeooo:paragraph-rsid="0099c9d9"/>
    </style:style>
    <style:style style:name="P15" style:family="paragraph" style:parent-style-name="Text_20_body">
      <style:paragraph-properties fo:margin-top="0.199cm" fo:margin-bottom="0.199cm" style:contextual-spacing="false"/>
    </style:style>
    <style:style style:name="P16" style:family="paragraph" style:parent-style-name="Text_20_body">
      <style:paragraph-properties fo:margin-top="0.199cm" fo:margin-bottom="0.199cm" style:contextual-spacing="false" style:writing-mode="lr-tb"/>
      <style:text-properties officeooo:paragraph-rsid="009b3f4e"/>
    </style:style>
    <style:style style:name="P17" style:family="paragraph" style:parent-style-name="Text_20_body">
      <style:paragraph-properties fo:margin-top="0.199cm" fo:margin-bottom="0.199cm" style:contextual-spacing="false"/>
      <style:text-properties officeooo:paragraph-rsid="009b3f4e"/>
    </style:style>
    <style:style style:name="P18" style:family="paragraph" style:parent-style-name="Text_20_body">
      <style:paragraph-properties fo:margin-top="0.199cm" fo:margin-bottom="0.199cm" style:contextual-spacing="false"/>
      <style:text-properties officeooo:rsid="008c43ed" officeooo:paragraph-rsid="008c43ed"/>
    </style:style>
    <style:style style:name="P19" style:family="paragraph" style:parent-style-name="Text_20_body">
      <style:paragraph-properties fo:margin-top="0.199cm" fo:margin-bottom="0.199cm" style:contextual-spacing="false"/>
      <style:text-properties officeooo:paragraph-rsid="008c43ed"/>
    </style:style>
    <style:style style:name="P20" style:family="paragraph" style:parent-style-name="Text_20_body">
      <style:paragraph-properties fo:margin-top="0.199cm" fo:margin-bottom="0.199cm" style:contextual-spacing="false" style:writing-mode="lr-tb"/>
      <style:text-properties officeooo:paragraph-rsid="009c6ecd"/>
    </style:style>
    <style:style style:name="P21" style:family="paragraph" style:parent-style-name="Text_20_body">
      <style:paragraph-properties fo:margin-top="0.199cm" fo:margin-bottom="0.199cm" style:contextual-spacing="false" style:writing-mode="lr-tb"/>
      <style:text-properties officeooo:rsid="009d127a" officeooo:paragraph-rsid="009d127a"/>
    </style:style>
    <style:style style:name="P22" style:family="paragraph" style:parent-style-name="Text_20_body">
      <style:paragraph-properties fo:margin-top="0.199cm" fo:margin-bottom="0.199cm" style:contextual-spacing="false"/>
      <style:text-properties officeooo:paragraph-rsid="009bc907"/>
    </style:style>
    <style:style style:name="P23" style:family="paragraph" style:parent-style-name="Text_20_body">
      <style:paragraph-properties fo:margin-top="0.199cm" fo:margin-bottom="0.199cm" style:contextual-spacing="false"/>
      <style:text-properties officeooo:paragraph-rsid="00a28abd"/>
    </style:style>
    <style:style style:name="P24" style:family="paragraph" style:parent-style-name="Text_20_body">
      <style:paragraph-properties fo:margin-top="0.199cm" fo:margin-bottom="0.199cm" style:contextual-spacing="false"/>
      <style:text-properties officeooo:rsid="00a11280" officeooo:paragraph-rsid="00a11280"/>
    </style:style>
    <style:style style:name="T1" style:family="text">
      <style:text-properties officeooo:rsid="00894cbd"/>
    </style:style>
    <style:style style:name="T2" style:family="text">
      <style:text-properties officeooo:rsid="00740e14"/>
    </style:style>
    <style:style style:name="T3" style:family="text">
      <style:text-properties officeooo:rsid="00a217df"/>
    </style:style>
    <style:style style:name="T4" style:family="text">
      <style:text-properties officeooo:rsid="00681e4f"/>
    </style:style>
    <style:style style:name="T5" style:family="text">
      <style:text-properties officeooo:rsid="00631d51"/>
    </style:style>
    <style:style style:name="T6" style:family="text">
      <style:text-properties officeooo:rsid="008a4923"/>
    </style:style>
    <style:style style:name="T7" style:family="text">
      <style:text-properties officeooo:rsid="00766d50"/>
    </style:style>
    <style:style style:name="T8" style:family="text">
      <style:text-properties officeooo:rsid="007d3d18"/>
    </style:style>
    <style:style style:name="T9" style:family="text">
      <style:text-properties officeooo:rsid="006dd61d"/>
    </style:style>
    <style:style style:name="T10" style:family="text">
      <style:text-properties fo:color="#a31515" loext:opacity="100%" fo:font-family="'Cascadia Mono'" fo:font-size="9pt"/>
    </style:style>
    <style:style style:name="T11" style:family="text">
      <style:text-properties fo:color="#a31515" loext:opacity="100%" fo:font-family="'Cascadia Mono'" fo:font-size="9pt" officeooo:rsid="006d832c"/>
    </style:style>
    <style:style style:name="T12" style:family="text">
      <style:text-properties officeooo:rsid="009b3f4e"/>
    </style:style>
    <style:style style:name="T13" style:family="text">
      <style:text-properties officeooo:rsid="009ad212"/>
    </style:style>
    <style:style style:name="T14" style:family="text">
      <style:text-properties officeooo:rsid="006d832c"/>
    </style:style>
    <style:style style:name="T15" style:family="text">
      <style:text-properties officeooo:rsid="006f1161"/>
    </style:style>
    <style:style style:name="T16" style:family="text">
      <style:text-properties officeooo:rsid="008c43ed"/>
    </style:style>
    <style:style style:name="T17" style:family="text">
      <style:text-properties officeooo:rsid="0097f2de"/>
    </style:style>
    <style:style style:name="T18" style:family="text">
      <style:text-properties officeooo:rsid="00a08511"/>
    </style:style>
    <style:style style:name="T19" style:family="text">
      <style:text-properties officeooo:rsid="008df3cb"/>
    </style:style>
    <style:style style:name="T20" style:family="text">
      <style:text-properties officeooo:rsid="008ff03f"/>
    </style:style>
    <style:style style:name="T21" style:family="text">
      <style:text-properties officeooo:rsid="009103f3"/>
    </style:style>
    <style:style style:name="T22" style:family="text">
      <style:text-properties officeooo:rsid="009bc907"/>
    </style:style>
    <style:style style:name="T23" style:family="text">
      <style:text-properties officeooo:rsid="009c6ecd"/>
    </style:style>
    <style:style style:name="T24" style:family="text">
      <style:text-properties officeooo:rsid="009d127a"/>
    </style:style>
    <style:style style:name="T25" style:family="text">
      <style:text-properties officeooo:rsid="00976aac"/>
    </style:style>
    <style:style style:name="T26" style:family="text">
      <style:text-properties officeooo:rsid="00978bc4"/>
    </style:style>
    <style:style style:name="T27" style:family="text">
      <style:text-properties officeooo:rsid="00a18118"/>
    </style:style>
    <style:style style:name="T28" style:family="text">
      <style:text-properties officeooo:rsid="00a11280"/>
    </style:style>
    <style:style style:name="T29" style:family="text">
      <style:text-properties officeooo:rsid="00a28abd"/>
    </style:style>
    <style:style style:name="T30" style:family="text">
      <style:text-properties officeooo:rsid="00a2f762"/>
    </style:style>
    <style:style style:name="T31" style:family="text">
      <style:text-properties officeooo:rsid="006199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lease Notes</text:h>
      <text:h text:style-name="Heading_20_2" text:outline-level="2">BasList <text:span text:style-name="T1">2</text:span>.<text:span text:style-name="T1">0</text:span><text:span text:style-name="T2">.</text:span>0 <text:span text:style-name="T1">for BasTools 1.0.0</text:span></text:h>
      <text:p text:style-name="P2">This document summarises the changes since 1.<text:span text:style-name="T1">1.</text:span>0.</text:p>
      <text:p text:style-name="P3">BasList 1.1.0 and earlier was a standalone utility. This version <text:span text:style-name="T3">is incorporated into</text:span> BasTools and offers numerous improvements.</text:p>
      <text:h text:style-name="Heading_20_3" text:outline-level="3">Enhancements</text:h>
      <text:p text:style-name="P4"><text:span text:style-name="T4">BasList requires </text:span>.Net <text:span text:style-name="T1">10</text:span>.0 or later (<text:a xlink:type="simple" xlink:href="https://dotnet.microsoft.com/en-us/download/dotnet/10.0" text:style-name="Internet_20_link" text:visited-style-name="Visited_20_Internet_20_Link">https://dotnet.microsoft.com/en-us/download/dotnet/<text:span text:style-name="T1">10</text:span>.0</text:a>)</text:p>
      <text:h text:style-name="Heading_20_3" text:outline-level="3"><text:span text:style-name="T5">Prettyprint </text:span><text:span text:style-name="T6">and Formatting Changes</text:span></text:h>
      <text:p text:style-name="P5"><text:span text:style-name="Strong_20_Emphasis">/prettyprint</text:span> in 1.1.0 both coloured syntax and added ‘legibility’ spaces. In 2.0.0, /prettyprint only colourises, meaning that the full formatting options are also available to the plain text listing if colours are not wanted.</text:p>
      <text:p text:style-name="P6"><text:span text:style-name="T6">As a reminder, t</text:span>he full list <text:span text:style-name="T6">of colours</text:span> is:</text:p>
      <table:table table:name="Table1" table:style-name="Table1">
        <table:table-column table:style-name="Table1.A"/>
        <table:table-column table:style-name="Table1.B"/>
        <table:table-header-rows>
          <table:table-row>
            <table:table-cell table:style-name="Table1.A1" office:value-type="string">
              <text:p text:style-name="P7">Token type</text:p>
            </table:table-cell>
            <table:table-cell table:style-name="Table1.B1" office:value-type="string">
              <text:p text:style-name="P7">Colour</text:p>
            </table:table-cell>
          </table:table-row>
        </table:table-header-rows>
        <table:table-row>
          <table:table-cell table:style-name="Table1.A2" office:value-type="string">
            <text:p text:style-name="P8">Keyword e.g. PRINT</text:p>
          </table:table-cell>
          <table:table-cell table:style-name="Table1.B2" office:value-type="string">
            <text:p text:style-name="P9">Blue</text:p>
          </table:table-cell>
        </table:table-row>
        <table:table-row>
          <table:table-cell table:style-name="Table1.A2" office:value-type="string">
            <text:p text:style-name="P8">Variable <text:span text:style-name="T7">(except @%)</text:span></text:p>
          </table:table-cell>
          <table:table-cell table:style-name="Table1.B2" office:value-type="string">
            <text:p text:style-name="P9">Magenta</text:p>
          </table:table-cell>
        </table:table-row>
        <table:table-row>
          <table:table-cell table:style-name="Table1.A2" office:value-type="string">
            <text:p text:style-name="P8">PROC or FN name</text:p>
          </table:table-cell>
          <table:table-cell table:style-name="Table1.B2" office:value-type="string">
            <text:p text:style-name="P9">Cyan</text:p>
          </table:table-cell>
        </table:table-row>
        <table:table-row>
          <table:table-cell table:style-name="Table1.A2" office:value-type="string">
            <text:p text:style-name="P8">Literal string</text:p>
            <text:p text:style-name="P10">ARM <text:span text:style-name="T8">registers (R0, R1, PC, SP etc.)</text:span></text:p>
          </table:table-cell>
          <table:table-cell table:style-name="Table1.B2" office:value-type="string">
            <text:p text:style-name="P11">Green</text:p>
          </table:table-cell>
        </table:table-row>
        <table:table-row>
          <table:table-cell table:style-name="Table1.A2" office:value-type="string">
            <text:p text:style-name="P8">REM</text:p>
          </table:table-cell>
          <table:table-cell table:style-name="Table1.B2" office:value-type="string">
            <text:p text:style-name="P9">Yellow / Brown</text:p>
          </table:table-cell>
        </table:table-row>
        <table:table-row>
          <table:table-cell table:style-name="Table1.A2" office:value-type="string">
            <text:p text:style-name="P8">Mathematical operator<text:span text:style-name="T9">s</text:span> (<text:span text:style-name="T10">+-/*=&lt;&gt;</text:span><text:span text:style-name="T11">^</text:span>) (but not ? ! $)</text:p>
          </table:table-cell>
          <table:table-cell table:style-name="Table1.B2" office:value-type="string">
            <text:p text:style-name="P9">Red</text:p>
          </table:table-cell>
        </table:table-row>
        <table:table-row>
          <table:table-cell table:style-name="Table1.A2" office:value-type="string">
            <text:p text:style-name="P9">GOTO / GOSUB / ON line numbers</text:p>
          </table:table-cell>
          <table:table-cell table:style-name="Table1.B2" office:value-type="string">
            <text:p text:style-name="P12"><text:span text:style-name="T12">Dark g</text:span>rey (changed <text:span text:style-name="T13">from 1.1.0</text:span>)</text:p>
          </table:table-cell>
        </table:table-row>
        <table:table-row>
          <table:table-cell table:style-name="Table1.A2" office:value-type="string">
            <text:p text:style-name="P13">Line numbering</text:p>
          </table:table-cell>
          <table:table-cell table:style-name="Table1.B2" office:value-type="string">
            <text:p text:style-name="P14"><text:span text:style-name="T14">Dark g</text:span>rey</text:p>
          </table:table-cell>
        </table:table-row>
        <table:table-row>
          <table:table-cell table:style-name="Table1.A2" office:value-type="string">
            <text:p text:style-name="P13"><text:span text:style-name="T15">All else, e.g. l</text:span>iteral numbers, hex numbers, * commands, <text:span text:style-name="T15">separators</text:span></text:p>
          </table:table-cell>
          <table:table-cell table:style-name="Table1.B2" office:value-type="string">
            <text:p text:style-name="P13">White / Black</text:p>
          </table:table-cell>
        </table:table-row>
      </table:table>
      <text:p text:style-name="P15"><text:span text:style-name="Strong_20_Emphasis">/</text:span><text:span text:style-name="Strong_20_Emphasis"><text:span text:style-name="T6">nospaces</text:span></text:span><text:span text:style-name="T6"> </text:span><text:span text:style-name="T12">is renamed </text:span><text:span text:style-name="Strong_20_Emphasis"><text:span text:style-name="T12">/noformat</text:span></text:span><text:span text:style-name="T12"> </text:span><text:span text:style-name="T6">(default: OFF). If specified, line numbers will not have a following space and legibility spaces will not be added. The default is to separate line numbers (if used) from the code and space out </text:span><text:span text:style-name="T16">keywords etc. to aid reading dense code. BasList 2.0.0 substantially improves this over 1.1.0, normalising the code by removing extraneous spaces and adding where needed, while preserving REMs and assembler comments. Lists, brackets and unary minus are correctly spaced.</text:span></text:p>
      <text:p text:style-name="P16"><text:span text:style-name="T16">If </text:span><text:span text:style-name="T12">/noformat</text:span><text:span text:style-name="T16"> is specified, </text:span><text:span text:style-name="T17">the </text:span><text:span text:style-name="T13">program is listed as originally entered.</text:span></text:p>
      <text:p text:style-name="P17">/<text:span text:style-name="T12">noformat no longer cancels /indent.</text:span></text:p>
      <text:p text:style-name="P18"><text:soft-page-break/><text:span text:style-name="Strong_20_Emphasis">/indent</text:span> – now not only indents loops – <text:span text:style-name="T18">now including WHILE … ENDWHILE – </text:span>but also CASE and multiline IF … THEN … ELSE statements in Basic V. <text:span text:style-name="T19">It may also indent the body of PROCs and FNs. </text:span><text:span text:style-name="T20">See ReadMe.</text:span></text:p>
      <text:p text:style-name="P19"><text:span text:style-name="Strong_20_Emphasis"><text:span text:style-name="T16">/</text:span></text:span><text:span text:style-name="Strong_20_Emphasis"><text:span text:style-name="T20">breakapart</text:span></text:span><text:span text:style-name="T20"> </text:span><text:span text:style-name="T12">is renamed </text:span><text:span text:style-name="Strong_20_Emphasis"><text:span text:style-name="T12">/splitlines</text:span></text:span><text:span text:style-name="T12">. It</text:span><text:span text:style-name="T20"> now properly indents line sections and splits at ELSE as well as colons. This can greatly improve the legibility of long single-line IF statements. </text:span><text:span text:style-name="T21">You are reminded, though, that single-line and multiline IF statements work differently. Don’t be fooled by the multiline appearance! </text:span><text:span text:style-name="Emphasis"><text:span text:style-name="T12">You are strongly advised not to suppress line numbers when /splitlines is in use.</text:span></text:span></text:p>
      <text:p text:style-name="P20"><text:span text:style-name="Strong_20_Emphasis"><text:span text:style-name="T22">/V</text:span></text:span> <text:span text:style-name="T22">(Basic V) – BasList now dynamically switches it on if it encounters two-byte tokens in Acorn-format programs. Note, however, that should, say, some ARM assembler or a multiline IF structure precede any Basic V keyword, BasList might not handle it correctly. You are therefore advised to use /V. If in doubt, try without and observe the </text:span><text:span text:style-name="T23">header that precedes the listing.</text:span></text:p>
      <text:p text:style-name="P21">BasList no longer displays Basic V keywords as their 8-bit equivalent, e.g. LOADCOUNT instead of TINT. Such commands cannot legitimately be used in a program in any case.</text:p>
      <text:p text:style-name="P22"><text:span text:style-name="Strong_20_Emphasis">/</text:span><text:span text:style-name="Strong_20_Emphasis"><text:span text:style-name="T22">notBasicV</text:span></text:span> – <text:span text:style-name="T23">Overrides automatic Basic V detection. Useful for programs </text:span><text:span text:style-name="T24">written for use on both 8‑bit and RiscOS machines that include 6502 assembler.</text:span></text:p>
      <text:p text:style-name="P22"><text:span text:style-name="Strong_20_Emphasis">/</text:span><text:span text:style-name="Strong_20_Emphasis"><text:span text:style-name="T25">clear</text:span></text:span> <text:span text:style-name="T25">and </text:span><text:span text:style-name="Strong_20_Emphasis"><text:span text:style-name="T25">/cls</text:span></text:span> – <text:span text:style-name="T25">Clear the console window before listing. Can be useful to prevent confusion with earlier listings in the same window. For example, Ctrl-Home will take you to the top of the latest listing.</text:span></text:p>
      <text:p text:style-name="P19"><text:span text:style-name="Strong_20_Emphasis"><text:span text:style-name="T25">/debug</text:span></text:span> – <text:span text:style-name="T25">displays each line with the original detokenised line, formatted line, </text:span><text:span text:style-name="T26">line with syntax tags and format</text:span><text:span text:style-name="T27">ted</text:span><text:span text:style-name="T26"> line with syntax tags. Best combined with /prettyprint.</text:span></text:p>
      <text:p text:style-name="P23"><draw:frame draw:style-name="fr1" draw:name="Image1" text:anchor-type="paragraph" svg:width="17cm" svg:height="2.768cm" draw:z-index="0"><draw:image xlink:href="Pictures/100000000000071400000127489C5114.png" xlink:type="simple" xlink:show="embed" xlink:actuate="onLoad" draw:mime-type="image/png"/></draw:frame><text:span text:style-name="Strong_20_Emphasis">/</text:span><text:span text:style-name="Strong_20_Emphasis"><text:span text:style-name="T28">saveddefaults</text:span></text:span><text:span text:style-name="T28"> – after parsing the command line, options are saved as defaults for next time. Excludes values that are specific to each run like filename, directives and line number limits. </text:span><text:span text:style-name="T29">If /</text:span><text:span text:style-name="T28">saveddefaults </text:span><text:span text:style-name="T29">is present on the command line, any saved defaults will be updated.</text:span></text:p>
      <text:p text:style-name="P24">To override a saved default, use /- (slash minus). Note that - is no longer an alternative to /</text:p>
      <text:p text:style-name="P24"><text:span text:style-name="Strong_20_Emphasis">/resetdefaults</text:span> – delete saved defaults.</text:p>
      <text:p text:style-name="P24"><text:span text:style-name="Strong_20_Emphasis">/exporttagged</text:span> – <text:span text:style-name="T30">display the formatted tagged line only (see /debug above). <text:s/>This is provided for the benefit of anyone wanting to provide their own formatter or to perform analysis. Pipe to a file or program as required.</text:span></text:p>
      <text:p text:style-name="P15">© Andrew Rowland 2022-202<text:span text:style-name="T31">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20%"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Malgun Gothic" fo:font-family="'Malgun Gothic'"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style:tab-stops/>
      </style:paragraph-properties>
    </style:style>
    <style:style style:name="List" style:family="paragraph" style:parent-style-name="Text_20_body" style:class="list">
      <style:text-properties style:font-name="Garamond" fo:font-family="Garamond"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Code" style:family="paragraph" style:parent-style-name="Standard">
      <style:text-properties style:font-name="Courier New" fo:font-family="'Courier New'" style:font-family-generic="modern" style:font-pitch="fixed" fo:font-size="10pt" style:font-size-asian="10pt" style:font-size-complex="10pt"/>
    </style:style>
    <style:style style:name="Example" style:family="paragraph" style:parent-style-name="Code">
      <style:paragraph-properties fo:margin-top="0cm" fo:margin-bottom="0.15cm" style:contextual-spacing="false"/>
      <style:text-properties fo:font-size="12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Malgun Gothic1" fo:font-family="'Malgun Gothic'" style:font-style-name="Regular" style:font-family-generic="swiss" style:font-pitch="variable" fo:font-size="16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cm" fo:margin-bottom="0.21cm" style: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349cm" fo:margin-bottom="0.21cm"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3cm" fo:margin-right="0cm" fo:text-indent="-1.3cm" style:auto-text-indent="false">
        <style:tab-stops/>
      </style:paragraph-properties>
    </style:style>
    <style:style style:name="Subhead" style:family="paragraph" style:parent-style-name="Text_20_body">
      <style:paragraph-properties fo:margin-left="1cm" fo:margin-right="0cm" fo:margin-top="0.21cm" fo:margin-bottom="0.21cm" style:contextual-spacing="false" fo:text-indent="0cm" style:auto-text-indent="false"/>
      <style:text-properties fo:font-weight="bold"/>
    </style:style>
    <style:style style:name="Table_20_Contents" style:display-name="Table Contents" style:family="paragraph" style:parent-style-name="Standard" style:class="extra">
      <style:paragraph-properties fo:margin-left="0.101cm" fo:margin-top="0.101cm" fo:margin-bottom="0.101cm" style:contextual-spacing="fals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text-indent="0cm" style:auto-text-indent="false"/>
    </style:style>
    <style:style style:name="Example" style:family="text">
      <style:text-properties style:font-name="Courier New1" fo:font-family="'Courier New'" style:font-style-name="Regular"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e5e4a" officeooo:paragraph-rsid="004e5e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Rowland</meta:initial-creator>
    <meta:creation-date>2022-09-10T16:31:29.234000000</meta:creation-date>
    <dc:date>2026-06-24T15:02:14.043671900</dc:date>
    <dc:creator>A C Rowland</dc:creator>
    <meta:editing-duration>P1DT1H28M52S</meta:editing-duration>
    <meta:editing-cycles>71</meta:editing-cycles>
    <meta:generator>LibreOffice/25.8.7.3$Windows_X86_64 LibreOffice_project/30742500f2d3eb4366ac312fa33d3dcabdb3eba5</meta:generator>
    <meta:print-date>2026-06-24T15:01:25.541375900</meta:print-date>
    <meta:printed-by>PDF files: A C Rowland</meta:printed-by>
    <meta:document-statistic meta:table-count="1" meta:image-count="1" meta:object-count="0" meta:page-count="2" meta:paragraph-count="46" meta:word-count="626" meta:character-count="3931" meta:non-whitespace-character-count="3340"/>
  </office:meta>
</office:document-meta>
</file>